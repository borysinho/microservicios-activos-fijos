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0A000004B367E52FD9.png" manifest:media-type="image/png"/>
  <manifest:file-entry manifest:full-path="Pictures/10000001000002AF0000037C6F67323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rial" svg:font-family="Arial, sans-serif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2.722cm" style:rel-column-width="1543*"/>
    </style:style>
    <style:style style:name="Tabla1.B" style:family="table-column">
      <style:table-column-properties style:column-width="14.868cm" style:rel-column-width="8429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3.494cm" table:align="left"/>
    </style:style>
    <style:style style:name="Tabla2.A" style:family="table-column">
      <style:table-column-properties style:column-width="3.298cm"/>
    </style:style>
    <style:style style:name="Tabla2.B" style:family="table-column">
      <style:table-column-properties style:column-width="5.098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C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6.824cm" style:rel-column-width="3869*"/>
    </style:style>
    <style:style style:name="Tabla3.B" style:family="table-column">
      <style:table-column-properties style:column-width="4.826cm" style:rel-column-width="2736*"/>
    </style:style>
    <style:style style:name="Tabla3.C" style:family="table-column">
      <style:table-column-properties style:column-width="5.939cm" style:rel-column-width="3367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C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C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4.53cm" style:rel-column-width="2568*"/>
    </style:style>
    <style:style style:name="Tabla4.B" style:family="table-column">
      <style:table-column-properties style:column-width="13.06cm" style:rel-column-width="7404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B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B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2.902cm" style:rel-column-width="1645*"/>
    </style:style>
    <style:style style:name="Tabla5.B" style:family="table-column">
      <style:table-column-properties style:column-width="3.235cm" style:rel-column-width="1834*"/>
    </style:style>
    <style:style style:name="Tabla5.C" style:family="table-column">
      <style:table-column-properties style:column-width="11.453cm" style:rel-column-width="6493*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C1" style:family="table-cell">
      <style:table-cell-properties fo:padding="0.097cm" fo:border="0.5pt solid #000000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C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2.217cm" style:rel-column-width="1257*"/>
    </style:style>
    <style:style style:name="Tabla6.B" style:family="table-column">
      <style:table-column-properties style:column-width="15.372cm" style:rel-column-width="8715*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7.588cm" table:align="left"/>
    </style:style>
    <style:style style:name="Tabla7.A" style:family="table-column">
      <style:table-column-properties style:column-width="3.607cm"/>
    </style:style>
    <style:style style:name="Tabla7.B" style:family="table-column">
      <style:table-column-properties style:column-width="2.738cm"/>
    </style:style>
    <style:style style:name="Tabla7.C" style:family="table-column">
      <style:table-column-properties style:column-width="5.983cm"/>
    </style:style>
    <style:style style:name="Tabla7.D" style:family="table-column">
      <style:table-column-properties style:column-width="5.26cm"/>
    </style:style>
    <style:style style:name="Tabla7.A1" style:family="table-cell">
      <style:table-cell-properties fo:padding="0.097cm" fo:border-left="0.5pt solid #000000" fo:border-right="none" fo:border-top="0.5pt solid #000000" fo:border-bottom="0.5pt solid #000000"/>
    </style:style>
    <style:style style:name="Tabla7.D1" style:family="table-cell">
      <style:table-cell-properties fo:padding="0.097cm" fo:border="0.5pt solid #000000"/>
    </style:style>
    <style:style style:name="Tabla7.A2" style:family="table-cell">
      <style:table-cell-properties fo:padding="0.097cm" fo:border-left="0.5pt solid #000000" fo:border-right="none" fo:border-top="none" fo:border-bottom="0.5pt solid #000000"/>
    </style:style>
    <style:style style:name="Tabla7.D2" style:family="table-cell">
      <style:table-cell-properties fo:padding="0.097cm" fo:border-left="0.5pt solid #000000" fo:border-right="0.5pt solid #000000" fo:border-top="none" fo:border-bottom="0.5pt solid #000000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3.39cm" style:rel-column-width="1922*"/>
    </style:style>
    <style:style style:name="Tabla8.B" style:family="table-column">
      <style:table-column-properties style:column-width="2.589cm" style:rel-column-width="1468*"/>
    </style:style>
    <style:style style:name="Tabla8.C" style:family="table-column">
      <style:table-column-properties style:column-width="11.61cm" style:rel-column-width="6582*"/>
    </style:style>
    <style:style style:name="Tabla8.A1" style:family="table-cell">
      <style:table-cell-properties fo:padding="0.097cm" fo:border-left="0.5pt solid #000000" fo:border-right="none" fo:border-top="0.5pt solid #000000" fo:border-bottom="0.5pt solid #000000"/>
    </style:style>
    <style:style style:name="Tabla8.C1" style:family="table-cell">
      <style:table-cell-properties fo:padding="0.097cm" fo:border="0.5pt solid #000000"/>
    </style:style>
    <style:style style:name="Tabla8.A2" style:family="table-cell">
      <style:table-cell-properties fo:padding="0.097cm" fo:border-left="0.5pt solid #000000" fo:border-right="none" fo:border-top="none" fo:border-bottom="0.5pt solid #000000"/>
    </style:style>
    <style:style style:name="Tabla8.C2" style:family="table-cell">
      <style:table-cell-properties fo:padding="0.097cm" fo:border-left="0.5pt solid #000000" fo:border-right="0.5pt solid #000000" fo:border-top="none" fo:border-bottom="0.5pt solid #000000"/>
    </style:style>
    <style:style style:name="Tabla9" style:family="table">
      <style:table-properties style:width="17.59cm" table:align="margins"/>
    </style:style>
    <style:style style:name="Tabla9.A" style:family="table-column">
      <style:table-column-properties style:column-width="3.526cm" style:rel-column-width="1999*"/>
    </style:style>
    <style:style style:name="Tabla9.B" style:family="table-column">
      <style:table-column-properties style:column-width="14.063cm" style:rel-column-width="7973*"/>
    </style:style>
    <style:style style:name="Tabla9.A1" style:family="table-cell">
      <style:table-cell-properties fo:padding="0.097cm" fo:border-left="0.5pt solid #000000" fo:border-right="none" fo:border-top="0.5pt solid #000000" fo:border-bottom="0.5pt solid #000000"/>
    </style:style>
    <style:style style:name="Tabla9.B1" style:family="table-cell">
      <style:table-cell-properties fo:padding="0.097cm" fo:border="0.5pt solid #000000"/>
    </style:style>
    <style:style style:name="Tabla9.A2" style:family="table-cell">
      <style:table-cell-properties fo:padding="0.097cm" fo:border-left="0.5pt solid #000000" fo:border-right="none" fo:border-top="none" fo:border-bottom="0.5pt solid #000000"/>
    </style:style>
    <style:style style:name="Tabla9.B2" style:family="table-cell">
      <style:table-cell-properties fo:padding="0.097cm" fo:border-left="0.5pt solid #000000" fo:border-right="0.5pt solid #000000" fo:border-top="none" fo:border-bottom="0.5pt solid #000000"/>
    </style:style>
    <style:style style:name="Tabla10" style:family="table">
      <style:table-properties style:width="17.59cm" table:align="margins"/>
    </style:style>
    <style:style style:name="Tabla10.A" style:family="table-column">
      <style:table-column-properties style:column-width="2.852cm" style:rel-column-width="1617*"/>
    </style:style>
    <style:style style:name="Tabla10.B" style:family="table-column">
      <style:table-column-properties style:column-width="2.531cm" style:rel-column-width="1435*"/>
    </style:style>
    <style:style style:name="Tabla10.C" style:family="table-column">
      <style:table-column-properties style:column-width="2.618cm" style:rel-column-width="1484*"/>
    </style:style>
    <style:style style:name="Tabla10.D" style:family="table-column">
      <style:table-column-properties style:column-width="9.589cm" style:rel-column-width="5436*"/>
    </style:style>
    <style:style style:name="Tab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la10.D1" style:family="table-cell">
      <style:table-cell-properties fo:padding="0.097cm" fo:border="0.5pt solid #000000"/>
    </style:style>
    <style:style style:name="Tabla10.A2" style:family="table-cell">
      <style:table-cell-properties fo:padding="0.097cm" fo:border-left="0.5pt solid #000000" fo:border-right="none" fo:border-top="none" fo:border-bottom="0.5pt solid #000000"/>
    </style:style>
    <style:style style:name="Tabla10.D2" style:family="table-cell">
      <style:table-cell-properties fo:padding="0.097cm" fo:border-left="0.5pt solid #000000" fo:border-right="0.5pt solid #000000" fo:border-top="none" fo:border-bottom="0.5pt solid #000000"/>
    </style:style>
    <style:style style:name="Tabla11" style:family="table">
      <style:table-properties style:width="17.59cm" table:align="margins"/>
    </style:style>
    <style:style style:name="Tabla11.A" style:family="table-column">
      <style:table-column-properties style:column-width="5.121cm" style:rel-column-width="2903*"/>
    </style:style>
    <style:style style:name="Tabla11.B" style:family="table-column">
      <style:table-column-properties style:column-width="3.687cm" style:rel-column-width="2090*"/>
    </style:style>
    <style:style style:name="Tabla11.C" style:family="table-column">
      <style:table-column-properties style:column-width="8.782cm" style:rel-column-width="4979*"/>
    </style:style>
    <style:style style:name="Tabla1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1.C1" style:family="table-cell">
      <style:table-cell-properties fo:padding="0.097cm" fo:border="0.5pt solid #000000"/>
    </style:style>
    <style:style style:name="Tabla11.A2" style:family="table-cell">
      <style:table-cell-properties fo:padding="0.097cm" fo:border-left="0.5pt solid #000000" fo:border-right="none" fo:border-top="none" fo:border-bottom="0.5pt solid #000000"/>
    </style:style>
    <style:style style:name="Tabla11.C2" style:family="table-cell">
      <style:table-cell-properties fo:padding="0.097cm" fo:border-left="0.5pt solid #000000" fo:border-right="0.5pt solid #000000" fo:border-top="none" fo:border-bottom="0.5pt solid #000000"/>
    </style:style>
    <style:style style:name="Tabla12" style:family="table">
      <style:table-properties style:width="17.59cm" table:align="margins"/>
    </style:style>
    <style:style style:name="Tabla12.A" style:family="table-column">
      <style:table-column-properties style:column-width="4.242cm" style:rel-column-width="2405*"/>
    </style:style>
    <style:style style:name="Tabla12.B" style:family="table-column">
      <style:table-column-properties style:column-width="7.038cm" style:rel-column-width="3990*"/>
    </style:style>
    <style:style style:name="Tabla12.C" style:family="table-column">
      <style:table-column-properties style:column-width="6.309cm" style:rel-column-width="3577*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C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C2" style:family="table-cell">
      <style:table-cell-properties fo:padding="0.097cm" fo:border-left="0.5pt solid #000000" fo:border-right="0.5pt solid #000000" fo:border-top="none" fo:border-bottom="0.5pt solid #000000"/>
    </style:style>
    <style:style style:name="Tabla13" style:family="table">
      <style:table-properties style:width="17.59cm" table:align="margins"/>
    </style:style>
    <style:style style:name="Tabla13.A" style:family="table-column">
      <style:table-column-properties style:column-width="6.045cm" style:rel-column-width="3427*"/>
    </style:style>
    <style:style style:name="Tabla13.B" style:family="table-column">
      <style:table-column-properties style:column-width="11.545cm" style:rel-column-width="6545*"/>
    </style:style>
    <style:style style:name="Tabla13.A1" style:family="table-cell">
      <style:table-cell-properties fo:padding="0.097cm" fo:border-left="0.5pt solid #000000" fo:border-right="none" fo:border-top="0.5pt solid #000000" fo:border-bottom="0.5pt solid #000000"/>
    </style:style>
    <style:style style:name="Tabla13.B1" style:family="table-cell">
      <style:table-cell-properties fo:padding="0.097cm" fo:border="0.5pt solid #000000"/>
    </style:style>
    <style:style style:name="Tabla13.A2" style:family="table-cell">
      <style:table-cell-properties fo:padding="0.097cm" fo:border-left="0.5pt solid #000000" fo:border-right="none" fo:border-top="none" fo:border-bottom="0.5pt solid #000000"/>
    </style:style>
    <style:style style:name="Tabla13.B2" style:family="table-cell">
      <style:table-cell-properties fo:padding="0.097cm" fo:border-left="0.5pt solid #000000" fo:border-right="0.5pt solid #000000" fo:border-top="none" fo:border-bottom="0.5pt solid #000000"/>
    </style:style>
    <style:style style:name="Tabla14" style:family="table">
      <style:table-properties style:width="17.59cm" table:align="margins"/>
    </style:style>
    <style:style style:name="Tabla14.A" style:family="table-column">
      <style:table-column-properties style:column-width="4.997cm" style:rel-column-width="2833*"/>
    </style:style>
    <style:style style:name="Tabla14.B" style:family="table-column">
      <style:table-column-properties style:column-width="12.592cm" style:rel-column-width="7139*"/>
    </style:style>
    <style:style style:name="Tabla14.A1" style:family="table-cell">
      <style:table-cell-properties fo:padding="0.097cm" fo:border-left="0.5pt solid #000000" fo:border-right="none" fo:border-top="0.5pt solid #000000" fo:border-bottom="0.5pt solid #000000"/>
    </style:style>
    <style:style style:name="Tabla14.B1" style:family="table-cell">
      <style:table-cell-properties fo:padding="0.097cm" fo:border="0.5pt solid #000000"/>
    </style:style>
    <style:style style:name="Tabla14.A2" style:family="table-cell">
      <style:table-cell-properties fo:padding="0.097cm" fo:border-left="0.5pt solid #000000" fo:border-right="none" fo:border-top="none" fo:border-bottom="0.5pt solid #000000"/>
    </style:style>
    <style:style style:name="Tabla14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margin-left="0cm" fo:margin-right="0cm" fo:margin-top="0cm" fo:margin-bottom="0cm" style:contextual-spacing="false" fo:line-height="138%" fo:text-align="center" style:justify-single-word="false" fo:text-indent="0cm" style:auto-text-indent="false" style:writing-mode="lr-tb"/>
      <style:text-properties officeooo:paragraph-rsid="001e5419"/>
    </style:style>
    <style:style style:name="P2" style:family="paragraph" style:parent-style-name="Text_20_body">
      <style:text-properties style:use-window-font-color="true" loext:opacity="0%" officeooo:paragraph-rsid="001e5419"/>
    </style:style>
    <style:style style:name="P3" style:family="paragraph" style:parent-style-name="First_20_Paragraph">
      <style:paragraph-properties fo:margin-left="0cm" fo:margin-right="0cm" fo:margin-top="0cm" fo:margin-bottom="0cm" style:contextual-spacing="false" fo:line-height="138%" fo:text-align="center" style:justify-single-word="false" fo:text-indent="0cm" style:auto-text-indent="false" style:writing-mode="lr-tb"/>
      <style:text-properties officeooo:paragraph-rsid="001e5419"/>
    </style:style>
    <style:style style:name="P4" style:family="paragraph" style:parent-style-name="Text_20_body">
      <style:text-properties officeooo:paragraph-rsid="001e5419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style:text-line-through-style="none" style:text-line-through-type="none" style:font-name="Arial" fo:font-size="11pt" fo:font-style="normal" style:text-underline-style="none" fo:font-weight="normal" officeooo:paragraph-rsid="001e5419" style:text-blinking="false" fo:background-color="transparent" style:font-size-asian="11pt" style:font-style-asian="normal" style:font-weight-asian="normal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officeooo:paragraph-rsid="001e5419"/>
    </style:style>
    <style:style style:name="P7" style:family="paragraph" style:parent-style-name="Text_20_body" style:list-style-name="WWNum4">
      <style:paragraph-properties fo:margin-top="0cm" fo:margin-bottom="0cm" style:contextual-spacing="false" fo:line-height="138%" style:writing-mode="lr-tb"/>
      <style:text-properties officeooo:paragraph-rsid="001e5419"/>
    </style:style>
    <style:style style:name="P8" style:family="paragraph" style:parent-style-name="Text_20_body" style:list-style-name="WWNum4">
      <style:paragraph-properties fo:margin-top="0cm" fo:margin-bottom="0cm" style:contextual-spacing="false" fo:line-height="138%" style:writing-mode="lr-tb"/>
      <style:text-properties fo:font-variant="normal" fo:text-transform="none" style:use-window-font-color="true" loext:opacity="0%" style:text-line-through-style="none" style:text-line-through-type="none" style:font-name="Arial" fo:font-size="11pt" fo:font-style="normal" style:text-underline-style="none" fo:font-weight="normal" officeooo:paragraph-rsid="001e5419" style:text-blinking="false" fo:background-color="transparent" style:font-size-asian="11pt" style:font-style-asian="normal" style:font-weight-asian="normal" style:font-weight-complex="normal"/>
    </style:style>
    <style:style style:name="P9" style:family="paragraph" style:parent-style-name="Heading_20_2">
      <style:paragraph-properties fo:text-align="justify" style:justify-single-word="false" fo:break-before="page"/>
    </style:style>
    <style:style style:name="P10" style:family="paragraph" style:parent-style-name="Heading_20_3">
      <style:paragraph-properties fo:text-align="justify" style:justify-single-word="false"/>
    </style:style>
    <style:style style:name="P11" style:family="paragraph" style:parent-style-name="Text_20_body">
      <style:paragraph-properties fo:text-align="justify" style:justify-single-word="false"/>
    </style:style>
    <style:style style:name="P12" style:family="paragraph" style:parent-style-name="Text_20_body">
      <style:paragraph-properties fo:text-align="center" style:justify-single-word="false"/>
    </style:style>
    <style:style style:name="P13" style:family="paragraph" style:parent-style-name="Heading_20_2">
      <style:paragraph-properties fo:text-align="justify" style:justify-single-word="false"/>
    </style:style>
    <style:style style:name="P14" style:family="paragraph" style:parent-style-name="Table_20_Heading">
      <style:paragraph-properties fo:text-align="justify" style:justify-single-word="false"/>
    </style:style>
    <style:style style:name="P15" style:family="paragraph" style:parent-style-name="Table_20_Contents">
      <style:paragraph-properties fo:text-align="justify" style:justify-single-word="false"/>
    </style:style>
    <style:style style:name="P16" style:family="paragraph" style:parent-style-name="Table_20_Contents">
      <style:paragraph-properties fo:text-align="justify" style:justify-single-word="false" style:writing-mode="lr-tb" style:writing-mode-automatic="false"/>
      <style:text-properties officeooo:rsid="001f4128" officeooo:paragraph-rsid="001f4128"/>
    </style:style>
    <style:style style:name="P17" style:family="paragraph" style:parent-style-name="Text_20_body" style:list-style-name="L1">
      <style:paragraph-properties fo:text-align="justify" style:justify-single-word="false"/>
    </style:style>
    <style:style style:name="P18" style:family="paragraph" style:parent-style-name="Text_20_body" style:list-style-name="L2">
      <style:paragraph-properties fo:text-align="justify" style:justify-single-word="false"/>
    </style:style>
    <style:style style:name="P19" style:family="paragraph" style:parent-style-name="Text_20_body" style:list-style-name="L3">
      <style:paragraph-properties fo:text-align="justify" style:justify-single-word="false"/>
    </style:style>
    <style:style style:name="P20" style:family="paragraph" style:parent-style-name="Text_20_body" style:list-style-name="L4">
      <style:paragraph-properties fo:text-align="justify" style:justify-single-word="false"/>
    </style:style>
    <style:style style:name="P21" style:family="paragraph" style:parent-style-name="Text_20_body" style:list-style-name="L5">
      <style:paragraph-properties fo:text-align="justify" style:justify-single-word="false"/>
    </style:style>
    <style:style style:name="P22" style:family="paragraph" style:parent-style-name="Text_20_body" style:list-style-name="L6">
      <style:paragraph-properties fo:text-align="justify" style:justify-single-word="false"/>
    </style:style>
    <style:style style:name="P23" style:family="paragraph" style:parent-style-name="Text_20_body" style:list-style-name="L7">
      <style:paragraph-properties fo:text-align="justify" style:justify-single-word="false"/>
    </style:style>
    <style:style style:name="P24" style:family="paragraph" style:parent-style-name="Text_20_body" style:list-style-name="L8">
      <style:paragraph-properties fo:text-align="justify" style:justify-single-word="false"/>
    </style:style>
    <style:style style:name="P25" style:family="paragraph" style:parent-style-name="Table_20_Contents">
      <style:paragraph-properties fo:text-align="justify" style:justify-single-word="false"/>
      <style:text-properties officeooo:rsid="001f4128" officeooo:paragraph-rsid="001f4128"/>
    </style:style>
    <style:style style:name="P26" style:family="paragraph" style:parent-style-name="Horizontal_20_Line">
      <style:paragraph-properties fo:text-align="justify" style:justify-single-word="false"/>
    </style:style>
    <style:style style:name="P27" style:family="paragraph" style:parent-style-name="Text_20_body" style:list-style-name="L9">
      <style:paragraph-properties fo:text-align="justify" style:justify-single-word="false"/>
    </style:style>
    <style:style style:name="P28" style:family="paragraph" style:parent-style-name="Text_20_body" style:list-style-name="L10">
      <style:paragraph-properties fo:text-align="justify" style:justify-single-word="false"/>
    </style:style>
    <style:style style:name="P29" style:family="paragraph" style:parent-style-name="Text_20_body" style:list-style-name="L11">
      <style:paragraph-properties fo:text-align="justify" style:justify-single-word="false"/>
    </style:style>
    <style:style style:name="P30" style:family="paragraph" style:parent-style-name="Text_20_body" style:list-style-name="L11">
      <style:paragraph-properties fo:margin-top="0cm" fo:margin-bottom="0cm" style:contextual-spacing="false" fo:text-align="justify" style:justify-single-word="false"/>
    </style:style>
    <style:style style:name="P31" style:family="paragraph" style:parent-style-name="Text_20_body" style:list-style-name="L12">
      <style:paragraph-properties fo:text-align="justify" style:justify-single-word="false"/>
    </style:style>
    <style:style style:name="P32" style:family="paragraph" style:parent-style-name="Text_20_body" style:list-style-name="L13">
      <style:paragraph-properties fo:text-align="justify" style:justify-single-word="false"/>
    </style:style>
    <style:style style:name="T1" style:family="text">
      <style:text-properties fo:font-variant="normal" fo:text-transform="none" style:use-window-font-color="true" loext:opacity="0%" style:text-line-through-style="none" style:text-line-through-type="none" style:font-name="Arial" fo:font-size="16pt" fo:font-style="normal" style:text-underline-style="none" fo:font-weight="bold" style:text-blinking="false" fo:background-color="transparent" loext:char-shading-value="0" style:font-size-asian="16pt" style:font-style-asian="normal" style:font-weight-asian="bold"/>
    </style:style>
    <style:style style:name="T2" style:family="text">
      <style:text-properties fo:font-variant="normal" fo:text-transform="none" style:use-window-font-color="true" loext:opacity="0%" style:text-line-through-style="none" style:text-line-through-type="none" style:font-name="Arial" fo:font-size="15pt" fo:font-style="normal" style:text-underline-style="none" fo:font-weight="bold" style:text-blinking="false" fo:background-color="transparent" loext:char-shading-value="0" style:font-size-asian="15pt" style:font-style-asian="normal" style:font-weight-asian="bold"/>
    </style:style>
    <style:style style:name="T3" style:family="text">
      <style:text-properties style:use-window-font-color="true" loext:opacity="0%"/>
    </style:style>
    <style:style style:name="T4" style:family="text">
      <style:text-properties fo:font-variant="normal" fo:text-transform="none" style:use-window-font-color="true" loext:opacity="0%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style:use-window-font-color="true" loext:opacity="0%" style:text-line-through-style="none" style:text-line-through-type="none" style:font-name="Arial" fo:font-size="17pt" fo:font-style="normal" style:text-underline-style="none" fo:font-weight="bold" style:text-blinking="false" fo:background-color="transparent" loext:char-shading-value="0" style:font-size-asian="17pt" style:font-style-asian="normal" style:font-weight-asian="bold"/>
    </style:style>
    <style:style style:name="T6" style:family="text">
      <style:text-properties fo:font-variant="normal" fo:text-transform="none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ize-asian="11pt" style:font-style-asian="normal" style:font-weight-asian="normal"/>
    </style:style>
    <style:style style:name="T7" style:family="text">
      <style:text-properties fo:font-variant="normal" fo:text-transform="none" style:use-window-font-color="true" loext:opacity="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 style:font-size-asian="11pt" style:font-style-asian="normal" style:font-weight-asian="bold"/>
    </style:style>
    <style:style style:name="T8" style:family="text">
      <style:text-properties fo:font-variant="normal" fo:text-transform="none" style:use-window-font-color="true" loext:opacity="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ize-asian="11pt" style:font-style-asian="normal" style:font-weight-asian="normal"/>
    </style:style>
    <style:style style:name="T9" style:family="text">
      <style:text-properties fo:font-variant="normal" fo:text-transform="none" style:use-window-font-color="true" loext:opacity="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 style:font-size-asian="11pt" style:font-style-asian="normal" style:font-weight-asian="bold" style:font-weight-complex="bold"/>
    </style:style>
    <style:style style:name="T10" style:family="text">
      <style:text-properties fo:font-variant="normal" fo:text-transform="none" style:use-window-font-color="true" loext:opacity="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ize-asian="11pt" style:font-style-asian="normal" style:font-weight-asian="normal" style:font-weight-complex="normal"/>
    </style:style>
    <style:style style:name="T11" style:family="text">
      <style:text-properties fo:font-weight="bold"/>
    </style:style>
    <style:style style:name="T12" style:family="text">
      <style:text-properties fo:font-style="italic"/>
    </style:style>
    <style:style style:name="T13" style:family="text">
      <style:text-properties style:font-name="Liberation Mono"/>
    </style:style>
    <style:style style:name="T14" style:family="text">
      <style:text-properties officeooo:rsid="0020bda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docs-internal-guid-3353af8b-7fff-1219-f3"/><text:span text:style-name="T1">UNIVERSIDAD AUTÓNOMA GABRIEL RENÉ MORENO</text:span></text:p>
      <text:p text:style-name="P1" loext:marker-style-name="T2"><text:span text:style-name="T2">FACULTAD DE INGENIERÍA EN CIENCIAS DE LA COMPUTACIÓN Y TELECOMUNICACIONES</text:span></text:p>
      <text:p text:style-name="P2" loext:marker-style-name="T3"/>
      <text:p text:style-name="P1" loext:marker-style-name="T4"><draw:frame draw:style-name="fr1" draw:name="Image1" text:anchor-type="as-char" svg:width="5.814cm" svg:height="7.518cm" draw:z-index="0"><draw:image xlink:href="Pictures/10000001000002AF0000037C6F673238.png" xlink:type="simple" xlink:show="embed" xlink:actuate="onLoad" draw:mime-type="image/png"/></draw:frame></text:p>
      <text:p text:style-name="P2" loext:marker-style-name="T3"/>
      <text:p text:style-name="P1" loext:marker-style-name="T5"><text:span text:style-name="T5">Segundo Parcial – Ingeniería de Software II</text:span></text:p>
      <text:p text:style-name="P2" loext:marker-style-name="T3"/>
      <text:p text:style-name="P3" loext:marker-style-name="T2"><text:span text:style-name="T2">Plataforma de Gestión de Eventos y Ticketing</text:span></text:p>
      <text:p text:style-name="P4" loext:marker-style-name="T3"><text:span text:style-name="T3"><text:line-break/></text:span></text:p>
      <text:p text:style-name="P5" loext:marker-style-name="T6"/>
      <text:p text:style-name="P6" loext:marker-style-name="T3"><text:span text:style-name="T7">Docente</text:span><text:span text:style-name="T8">: Ing. Rolando Martinez Canedo</text:span></text:p>
      <text:p text:style-name="P6" loext:marker-style-name="T9"><text:span text:style-name="T9">Integrantes:</text:span></text:p>
      <text:list text:style-name="WWNum4">
        <text:list-item>
          <text:p text:style-name="P7" loext:marker-style-name="T10"><text:span text:style-name="T10">Loaiza Lavarden Reymar – 216027438</text:span></text:p>
        </text:list-item>
        <text:list-item>
          <text:p text:style-name="P7" loext:marker-style-name="T10"><text:span text:style-name="T10">Peña del Rio Alexander – 212179403</text:span></text:p>
        </text:list-item>
        <text:list-item>
          <text:p text:style-name="P8" loext:marker-style-name="T10">Quiroga Flores Herland Borys – 200104373</text:p>
        </text:list-item>
      </text:list>
      <text:h text:style-name="P9" text:outline-level="2">1. Tema del Proyecto</text:h>
      <text:h text:style-name="P10" text:outline-level="3">Sistema de Gestión de Activos Fijos</text:h>
      <text:p text:style-name="P11">El proyecto consiste en el desarrollo de una <text:span text:style-name="T11">plataforma distribuida para la gestión integral de activos fijos</text:span> de una organización. El sistema permite registrar, asignar, trasladar, depreciar y dar de baja bienes físicos, integrando inteligencia artificial para el diagnóstico del estado de los activos, gestión documental con auditoría completa, automatización de procesos operativos y analítica de negocios.</text:p>
      <text:p text:style-name="P11">La plataforma está compuesta por <text:span text:style-name="T11">tres microservicios independientes</text:span> desplegados en distintos proveedores de nube, un frontend web desarrollado en Angular y una aplicación móvil en React Native orientada al trabajo de campo.</text:p>
      <text:p text:style-name="P11">El dominio de aplicación es un sistema de gestión empresarial para el seguimiento del ciclo de vida completo de activos físicos: desde su adquisición hasta su baja, pasando por asignaciones, traslados, mantenimientos y depreciación contable.</text:p>
      <text:p text:style-name="P11">El diagrama a continuación presenta la visión arquitectónica general del sistema, mostrando los actores principales, los contenedores que conforman la plataforma y las integraciones con sistemas externos:</text:p>
      <text:p text:style-name="P11"><draw:frame draw:style-name="fr2" draw:name="Imagen1" text:anchor-type="char" svg:width="17.59cm" svg:height="13.686cm" draw:z-index="1"><draw:image xlink:href="Pictures/100000010000060A000004B367E52FD9.png" xlink:type="simple" xlink:show="embed" xlink:actuate="onLoad" draw:mime-type="image/png"/></draw:frame><text:soft-page-break/></text:p>
      <text:p text:style-name="P12"><text:span text:style-name="T12">Figura 1. Diagrama de Contenedores (C4 Nivel 2) — Sistema de Gestión de Activos Fijos. </text:span></text:p>
      <text:h text:style-name="P13" text:outline-level="2">2. Aplicación de los Requisitos Solicitados</text:h>
      <text:p text:style-name="P11">A continuación se detalla de forma precisa en qué componente del sistema se implementa cada uno de los requisitos técnicos establecidos para el proyecto.</text:p>
      <text:h text:style-name="P10" text:outline-level="3">2.1 Arquitectura de Microservicios (mínimo tres)</text:h>
      <text:p text:style-name="P11">El sistema se compone de exactamente tres microservicios con responsabilidades bien delimitadas:</text:p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14">Microservicio</text:p>
            </table:table-cell>
            <table:table-cell table:style-name="Tabla1.B1" office:value-type="string">
              <text:p text:style-name="P14">Responsabilidad principal</text:p>
            </table:table-cell>
          </table:table-row>
        </table:table-header-rows>
        <table:table-row>
          <table:table-cell table:style-name="Tabla1.A2" office:value-type="string">
            <text:p text:style-name="P15"><text:span text:style-name="T11">MS1</text:span></text:p>
          </table:table-cell>
          <table:table-cell table:style-name="Tabla1.B2" office:value-type="string">
            <text:p text:style-name="P15">Gestión de activos fijos, depreciación, asignaciones, Business Intelligence y blockchain</text:p>
          </table:table-cell>
        </table:table-row>
        <table:table-row>
          <table:table-cell table:style-name="Tabla1.A2" office:value-type="string">
            <text:p text:style-name="P15"><text:span text:style-name="T11">MS2</text:span></text:p>
          </table:table-cell>
          <table:table-cell table:style-name="Tabla1.B2" office:value-type="string">
            <text:p text:style-name="P15">Gestión documental, auditoría e inteligencia artificial (Deep Learning y Machine Learning)</text:p>
          </table:table-cell>
        </table:table-row>
        <table:table-row>
          <table:table-cell table:style-name="Tabla1.A2" office:value-type="string">
            <text:p text:style-name="P15"><text:span text:style-name="T11">MS3</text:span></text:p>
          </table:table-cell>
          <table:table-cell table:style-name="Tabla1.B2" office:value-type="string">
            <text:p text:style-name="P15">Automatización de flujos y notificaciones mediante N8N</text:p>
          </table:table-cell>
        </table:table-row>
      </table:table>
      <text:p text:style-name="P11"><text:soft-page-break/></text:p>
      <text:p text:style-name="P11">Cada microservicio opera de forma independiente y se comunica con los demás a través de APIs REST y webhooks.</text:p>
      <text:h text:style-name="P10" text:outline-level="3">2.2 Proveedores de Nube Distintos</text:h>
      <text:p text:style-name="P11">Cada microservicio se despliega en un proveedor de nube diferente:</text:p>
      <table:table table:name="Tabla2" table:style-name="Tabla2">
        <table:table-column table:style-name="Tabla2.A"/>
        <table:table-column table:style-name="Tabla2.B" table:number-columns-repeated="2"/>
        <table:table-header-rows>
          <table:table-row>
            <table:table-cell table:style-name="Tabla2.A1" office:value-type="string">
              <text:p text:style-name="P14">Microservicio</text:p>
            </table:table-cell>
            <table:table-cell table:style-name="Tabla2.A1" office:value-type="string">
              <text:p text:style-name="P14">Proveedor</text:p>
            </table:table-cell>
            <table:table-cell table:style-name="Tabla2.C1" office:value-type="string">
              <text:p text:style-name="P14">Servicio de despliegue</text:p>
            </table:table-cell>
          </table:table-row>
        </table:table-header-rows>
        <table:table-row>
          <table:table-cell table:style-name="Tabla2.A2" office:value-type="string">
            <text:p text:style-name="P15">MS1</text:p>
          </table:table-cell>
          <table:table-cell table:style-name="Tabla2.A2" office:value-type="string">
            <text:p text:style-name="P15">Microsoft Azure</text:p>
          </table:table-cell>
          <table:table-cell table:style-name="Tabla2.C2" office:value-type="string">
            <text:p text:style-name="P15">Azure App Service</text:p>
          </table:table-cell>
        </table:table-row>
        <table:table-row>
          <table:table-cell table:style-name="Tabla2.A2" office:value-type="string">
            <text:p text:style-name="P15">MS2</text:p>
          </table:table-cell>
          <table:table-cell table:style-name="Tabla2.A2" office:value-type="string">
            <text:p text:style-name="P15">Amazon Web Services</text:p>
          </table:table-cell>
          <table:table-cell table:style-name="Tabla2.C2" office:value-type="string">
            <text:p text:style-name="P15">AWS Lambda / ECS</text:p>
          </table:table-cell>
        </table:table-row>
        <table:table-row>
          <table:table-cell table:style-name="Tabla2.A2" office:value-type="string">
            <text:p text:style-name="P15">MS3</text:p>
          </table:table-cell>
          <table:table-cell table:style-name="Tabla2.A2" office:value-type="string">
            <text:p text:style-name="P15">Google Cloud Platform</text:p>
          </table:table-cell>
          <table:table-cell table:style-name="Tabla2.C2" office:value-type="string">
            <text:p text:style-name="P15">Cloud Run</text:p>
          </table:table-cell>
        </table:table-row>
      </table:table>
      <text:p text:style-name="P11"/>
      <text:p text:style-name="P11">Ningún componente se ejecuta en infraestructura local; el despliegue es completamente en la nube.</text:p>
      <text:h text:style-name="P10" text:outline-level="3">2.3 Lenguajes de Programación Distintos por Microservicio</text:h>
      <text:p text:style-name="P11">Cada microservicio utiliza un lenguaje y framework de backend diferente:</text:p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able:table-row>
            <table:table-cell table:style-name="Tabla3.A1" office:value-type="string">
              <text:p text:style-name="P14">Microservicio</text:p>
            </table:table-cell>
            <table:table-cell table:style-name="Tabla3.A1" office:value-type="string">
              <text:p text:style-name="P14">Lenguaje</text:p>
            </table:table-cell>
            <table:table-cell table:style-name="Tabla3.C1" office:value-type="string">
              <text:p text:style-name="P14">Framework</text:p>
            </table:table-cell>
          </table:table-row>
        </table:table-header-rows>
        <table:table-row>
          <table:table-cell table:style-name="Tabla3.A2" office:value-type="string">
            <text:p text:style-name="P15">MS1</text:p>
          </table:table-cell>
          <table:table-cell table:style-name="Tabla3.A2" office:value-type="string">
            <text:p text:style-name="P15">Java</text:p>
          </table:table-cell>
          <table:table-cell table:style-name="Tabla3.C2" office:value-type="string">
            <text:p text:style-name="P15">Spring Boot</text:p>
          </table:table-cell>
        </table:table-row>
        <table:table-row>
          <table:table-cell table:style-name="Tabla3.A2" office:value-type="string">
            <text:p text:style-name="P15">MS2</text:p>
          </table:table-cell>
          <table:table-cell table:style-name="Tabla3.A2" office:value-type="string">
            <text:p text:style-name="P15">Python</text:p>
          </table:table-cell>
          <table:table-cell table:style-name="Tabla3.C2" office:value-type="string">
            <text:p text:style-name="P15">FastAPI</text:p>
          </table:table-cell>
        </table:table-row>
        <table:table-row>
          <table:table-cell table:style-name="Tabla3.A2" office:value-type="string">
            <text:p text:style-name="P15">MS3</text:p>
          </table:table-cell>
          <table:table-cell table:style-name="Tabla3.A2" office:value-type="string">
            <text:p text:style-name="P16">NestJS</text:p>
          </table:table-cell>
          <table:table-cell table:style-name="Tabla3.C2" office:value-type="string">
            <text:p text:style-name="P15">Express</text:p>
          </table:table-cell>
        </table:table-row>
      </table:table>
      <text:p text:style-name="P11"/>
      <text:h text:style-name="P10" text:outline-level="3">2.4 Frontend Web en Angular</text:h>
      <text:p text:style-name="P11">Se desarrolla una <text:span text:style-name="T11">interfaz web única</text:span> en Angular que consume los tres microservicios. La comunicación con MS1 se realiza exclusivamente mediante GraphQL; con MS2 y MS3 se utiliza REST.</text:p>
      <text:h text:style-name="P10" text:outline-level="3">2.5 Aplicación Móvil en React Native</text:h>
      <text:p text:style-name="P11">La aplicación móvil está orientada al trabajo de campo de los responsables de área. No es una réplica de la interfaz web; cuenta con funcionalidades propias que aprovechan los recursos del dispositivo.</text:p>
      <text:p text:style-name="P11"><text:span text:style-name="T11">Recursos del dispositivo utilizados:</text:span></text:p>
      <table:table table:name="Tabla4" table:style-name="Tabla4">
        <table:table-column table:style-name="Tabla4.A"/>
        <table:table-column table:style-name="Tabla4.B"/>
        <table:table-header-rows>
          <table:table-row>
            <table:table-cell table:style-name="Tabla4.A1" office:value-type="string">
              <text:p text:style-name="P14">Recurso</text:p>
            </table:table-cell>
            <table:table-cell table:style-name="Tabla4.B1" office:value-type="string">
              <text:p text:style-name="P14">Aplicación en el sistema</text:p>
            </table:table-cell>
          </table:table-row>
        </table:table-header-rows>
        <table:table-row>
          <table:table-cell table:style-name="Tabla4.A2" office:value-type="string">
            <text:p text:style-name="P15"><text:span text:style-name="T11">Cámara</text:span></text:p>
          </table:table-cell>
          <table:table-cell table:style-name="Tabla4.B2" office:value-type="string">
            <text:p text:style-name="P15">Fotografiar activos para diagnóstico automático de estado mediante IA</text:p>
          </table:table-cell>
        </table:table-row>
        <table:table-row>
          <table:table-cell table:style-name="Tabla4.A2" office:value-type="string">
            <text:p text:style-name="P15"><text:span text:style-name="T11">GPS</text:span></text:p>
          </table:table-cell>
          <table:table-cell table:style-name="Tabla4.B2" office:value-type="string">
            <text:p text:style-name="P15">Geolocalizar activos físicamente y registrar ubicación en inspecciones</text:p>
          </table:table-cell>
        </table:table-row>
        <table:table-row>
          <table:table-cell table:style-name="Tabla4.A2" office:value-type="string">
            <text:p text:style-name="P15"><text:span text:style-name="T11">Almacenamiento local</text:span></text:p>
          </table:table-cell>
          <table:table-cell table:style-name="Tabla4.B2" office:value-type="string">
            <text:p text:style-name="P15">Caché offline de activos asignados para trabajo sin conexión a internet</text:p>
          </table:table-cell>
        </table:table-row>
      </table:table>
      <text:p text:style-name="P11"/>
      <text:p text:style-name="P11"><text:soft-page-break/><text:span text:style-name="T11">Integración de IA en la app móvil:</text:span> la aplicación permite tomar una fotografía de un activo y recibir en tiempo real un diagnóstico generado por un modelo de redes neuronales convolucionales (CNN), indicando el estado físico del activo (bueno, deteriorado o requiere mantenimiento), junto con el nivel de confianza de la predicción y una recomendación automática.</text:p>
      <text:h text:style-name="P10" text:outline-level="3">2.6 Módulo de Gestión Empresarial con GraphQL</text:h>
      <text:p text:style-name="P11">El <text:span text:style-name="T11">MS1</text:span> constituye el módulo de gestión empresarial del sistema. Incluye interfaces, procesos, reportes y persistencia de datos. La comunicación entre el frontend Angular y este módulo se realiza <text:span text:style-name="T11">exclusivamente mediante GraphQL</text:span>, a través de un único endpoint que permite consultar y mutar datos de activos, asignaciones, traslados, bajas y reportes.</text:p>
      <text:h text:style-name="P10" text:outline-level="3">2.7 Gestión Documental con Auditoría</text:h>
      <text:p text:style-name="P11">Implementada en el <text:span text:style-name="T11">MS2</text:span>. Cada activo puede tener documentos asociados (facturas, contratos de garantía, fotografías de estado, informes de mantenimiento, actas de baja). El módulo registra de forma automática:</text:p>
      <text:list text:style-name="L1">
        <text:list-item>
          <text:p text:style-name="P17">Quién visualizó, modificó, descargó o eliminó cada documento</text:p>
        </text:list-item>
        <text:list-item>
          <text:p text:style-name="P17">La dirección IP desde la que se realizó la acción</text:p>
        </text:list-item>
        <text:list-item>
          <text:p text:style-name="P17">La versión anterior del documento en caso de modificación</text:p>
        </text:list-item>
        <text:list-item>
          <text:p text:style-name="P17">La marca de tiempo exacta de cada acceso</text:p>
        </text:list-item>
      </text:list>
      <text:h text:style-name="P10" text:outline-level="3" text:is-list-header="true">2.8 Deep Learning — Procesamiento de Imágenes</text:h>
      <text:p text:style-name="P11">Implementado en el <text:span text:style-name="T11">MS2</text:span> mediante un modelo de <text:span text:style-name="T11">Red Neuronal Convolucional (CNN)</text:span>. El modelo recibe la fotografía de un activo tomada desde la app móvil o cargada desde el frontend y clasifica su estado físico como: bueno, deteriorado, requiere mantenimiento u oxidado, devolviendo además el nivel de confianza de la clasificación.</text:p>
      <text:h text:style-name="P10" text:outline-level="3">2.9 Machine Learning — Supervisado y No Supervisado</text:h>
      <text:p text:style-name="P11">Ambos modelos residen en el <text:span text:style-name="T11">MS2</text:span> y son accesibles desde el frontend web:</text:p>
      <text:list text:style-name="L2">
        <text:list-item>
          <text:p text:style-name="P18"><text:span text:style-name="T11">Aprendizaje Supervisado — Random Forest</text:span>: predice la vida útil restante de un activo en meses, a partir de su edad, número de mantenimientos, resultados históricos de diagnósticos y categoría. Devuelve también la probabilidad de fallo en el corto plazo.</text:p>
        </text:list-item>
        <text:list-item>
          <text:p text:style-name="P18"><text:span text:style-name="T11">Aprendizaje No Supervisado — K-Means</text:span>: agrupa el inventario de activos por patrones de comportamiento (alta tasa de mantenimiento, comportamiento anómalo, rendimiento eficiente), permitiendo optimizar el presupuesto de mantenimiento preventivo.</text:p>
        </text:list-item>
      </text:list>
      <text:h text:style-name="P10" text:outline-level="3" text:is-list-header="true">2.10 Business Intelligence</text:h>
      <text:p text:style-name="P11">Implementado en el <text:span text:style-name="T11">MS1</text:span>. El frontend Angular consume un endpoint GraphQL (<text:span text:style-name="T13">dashboardBI</text:span>) que provee indicadores clave, gráficas de depreciación acumulada por categoría, distribución del inventario <text:soft-page-break/>por estado, proyección de vida útil y tendencia de adquisiciones por año.</text:p>
      <text:h text:style-name="P10" text:outline-level="3">2.11 Blockchain — Registro Inmutable</text:h>
      <text:p text:style-name="P11">Implementado en el <text:span text:style-name="T11">MS1</text:span> mediante el adaptador <text:span text:style-name="T11">Web3j</text:span> conectado a una red blockchain (Hyperledger / Ethereum). Cada operación crítica sobre un activo genera un registro inmutable con su hash de transacción y número de bloque, permitiendo verificación externa en cualquier momento. Los eventos registrados son: adquisición, asignación, traslado, baja y diagnóstico crítico.</text:p>
      <text:h text:style-name="P10" text:outline-level="3">2.12 Automatización — N8N (mínimo tres pasos)</text:h>
      <text:p text:style-name="P11">Implementada en el <text:span text:style-name="T11">MS3</text:span> mediante la herramienta N8N. El flujo principal consta de los siguientes pasos:</text:p>
      <text:list text:style-name="L3">
        <text:list-item>
          <text:p text:style-name="P19">El <text:span text:style-name="T11">MS1 detecta</text:span> un evento (por ejemplo, garantía próxima a vencer) y dispara un webhook hacia el MS3.</text:p>
        </text:list-item>
        <text:list-item>
          <text:p text:style-name="P19">El <text:span text:style-name="T11">N8N consulta al MS2</text:span> si la documentación del activo está completa.</text:p>
        </text:list-item>
        <text:list-item>
          <text:p text:style-name="P19">Se <text:span text:style-name="T11">genera una orden de revisión</text:span> en el MS1.</text:p>
        </text:list-item>
        <text:list-item>
          <text:p text:style-name="P19">Se <text:span text:style-name="T11">envía un correo electrónico</text:span> al responsable del activo mediante SendGrid.</text:p>
        </text:list-item>
        <text:list-item>
          <text:p text:style-name="P19">Se <text:span text:style-name="T11">envía una notificación push</text:span> a la aplicación móvil del responsable.</text:p>
        </text:list-item>
      </text:list>
      <text:h text:style-name="P10" text:outline-level="3" text:is-list-header="true">2.13 Bases de Datos — Relacional y NoSQL</text:h>
      <table:table table:name="Tabla5" table:style-name="Tabla5">
        <table:table-column table:style-name="Tabla5.A"/>
        <table:table-column table:style-name="Tabla5.B"/>
        <table:table-column table:style-name="Tabla5.C"/>
        <table:table-header-rows>
          <table:table-row>
            <table:table-cell table:style-name="Tabla5.A1" office:value-type="string">
              <text:p text:style-name="P14">Motor</text:p>
            </table:table-cell>
            <table:table-cell table:style-name="Tabla5.A1" office:value-type="string">
              <text:p text:style-name="P14">Microservicio</text:p>
            </table:table-cell>
            <table:table-cell table:style-name="Tabla5.C1" office:value-type="string">
              <text:p text:style-name="P14">Uso</text:p>
            </table:table-cell>
          </table:table-row>
        </table:table-header-rows>
        <table:table-row>
          <table:table-cell table:style-name="Tabla5.A2" office:value-type="string">
            <text:p text:style-name="P15"><text:span text:style-name="T11">PostgreSQL</text:span></text:p>
          </table:table-cell>
          <table:table-cell table:style-name="Tabla5.A2" office:value-type="string">
            <text:p text:style-name="P15">MS1</text:p>
          </table:table-cell>
          <table:table-cell table:style-name="Tabla5.C2" office:value-type="string">
            <text:p text:style-name="P15">Activos, asignaciones, traslados, depreciación, usuarios</text:p>
          </table:table-cell>
        </table:table-row>
        <table:table-row>
          <table:table-cell table:style-name="Tabla5.A2" office:value-type="string">
            <text:p text:style-name="P15"><text:span text:style-name="T11">DynamoDB</text:span></text:p>
          </table:table-cell>
          <table:table-cell table:style-name="Tabla5.A2" office:value-type="string">
            <text:p text:style-name="P15">MS2</text:p>
          </table:table-cell>
          <table:table-cell table:style-name="Tabla5.C2" office:value-type="string">
            <text:p text:style-name="P15">Metadatos de documentos y registros de auditoría</text:p>
          </table:table-cell>
        </table:table-row>
      </table:table>
      <text:p text:style-name="P11"/>
      <text:h text:style-name="P10" text:outline-level="3">2.14 Almacenamiento de Archivos — Amazon S3</text:h>
      <text:p text:style-name="P11">El <text:span text:style-name="T11">MS2</text:span> utiliza Amazon S3 para almacenar todos los archivos físicos (PDF, imágenes, contratos, facturas). DynamoDB almacena únicamente los metadatos y las URLs de acceso, reduciendo costos y mejorando los tiempos de acceso.</text:p>
      <text:h text:style-name="P10" text:outline-level="3">2.15 Despliegue 100% en la Nube</text:h>
      <text:p text:style-name="P11">El sistema no tiene componentes de ejecución local. Los tres microservicios están desplegados en Azure, AWS y Google Cloud respectivamente. El frontend se sirve desde CDN y la app móvil se distribuye a través de las tiendas de aplicaciones.</text:p>
      <text:h text:style-name="P10" text:outline-level="3">2.16 Metodología de Desarrollo</text:h>
      <text:p text:style-name="P11">Se utiliza el <text:span text:style-name="T11">Proceso Unificado</text:span>, con sus fases de inicio, elaboración, construcción y transición, adaptadas al desarrollo incremental de los tres microservicios.</text:p>
      <text:h text:style-name="P10" text:outline-level="3"><text:soft-page-break/>2.17 Modelado</text:h>
      <table:table table:name="Tabla6" table:style-name="Tabla6">
        <table:table-column table:style-name="Tabla6.A"/>
        <table:table-column table:style-name="Tabla6.B"/>
        <table:table-header-rows>
          <table:table-row>
            <table:table-cell table:style-name="Tabla6.A1" office:value-type="string">
              <text:p text:style-name="P14">Enfoque</text:p>
            </table:table-cell>
            <table:table-cell table:style-name="Tabla6.B1" office:value-type="string">
              <text:p text:style-name="P14">Aplicación</text:p>
            </table:table-cell>
          </table:table-row>
        </table:table-header-rows>
        <table:table-row>
          <table:table-cell table:style-name="Tabla6.A2" office:value-type="string">
            <text:p text:style-name="P15"><text:span text:style-name="T11">Modelo C4</text:span></text:p>
          </table:table-cell>
          <table:table-cell table:style-name="Tabla6.B2" office:value-type="string">
            <text:p text:style-name="P15">Diagramas de contexto y contenedores para modelar la arquitectura del sistema</text:p>
          </table:table-cell>
        </table:table-row>
        <table:table-row>
          <table:table-cell table:style-name="Tabla6.A2" office:value-type="string">
            <text:p text:style-name="P15"><text:span text:style-name="T11">UML</text:span></text:p>
          </table:table-cell>
          <table:table-cell table:style-name="Tabla6.B2" office:value-type="string">
            <text:p text:style-name="P15">Diagramas de clases, componentes, casos de uso, secuencia, actividad y estados para el resto del modelado</text:p>
          </table:table-cell>
        </table:table-row>
      </table:table>
      <text:p text:style-name="P11"/>
      <text:h text:style-name="P13" text:outline-level="2">3. Funcionalidades del Sistema</text:h>
      <text:h text:style-name="P10" text:outline-level="3">3.1 MS1 — Gestión de Activos Fijos (Java / Spring Boot / Azure)</text:h>
      <text:list text:style-name="L4">
        <text:list-item>
          <text:p text:style-name="P20"><text:span text:style-name="T11">Registro y catalogación de activos</text:span>: alta de nuevos activos con código único, categoría, valor de adquisición, vida útil estimada y área de destino inicial.</text:p>
        </text:list-item>
        <text:list-item>
          <text:p text:style-name="P20"><text:span text:style-name="T11">Asignación de activos</text:span>: vinculación de un activo a un responsable de área con registro de fecha y observaciones.</text:p>
        </text:list-item>
        <text:list-item>
          <text:p text:style-name="P20"><text:span text:style-name="T11">Registro de traslados</text:span>: cambio de área de un activo con identificación del autorizador y motivo del traslado.</text:p>
        </text:list-item>
        <text:list-item>
          <text:p text:style-name="P20"><text:span text:style-name="T11">Cálculo automático de depreciación</text:span>: cálculo periódico según el método configurado por categoría (lineal, acelerado, suma de dígitos).</text:p>
        </text:list-item>
        <text:list-item>
          <text:p text:style-name="P20"><text:span text:style-name="T11">Baja de activos</text:span>: registro definitivo de activos fuera de uso, con motivo, valor residual y autorizador.</text:p>
        </text:list-item>
        <text:list-item>
          <text:p text:style-name="P20"><text:span text:style-name="T11">Gestión de usuarios y roles</text:span>: administración de accesos con roles (Administrador, Responsable de Área, Auditor, Solo Lectura).</text:p>
        </text:list-item>
        <text:list-item>
          <text:p text:style-name="P20"><text:span text:style-name="T11">Dashboard de Business Intelligence</text:span>: indicadores en tiempo real sobre el inventario, depreciación y proyecciones.</text:p>
        </text:list-item>
        <text:list-item>
          <text:p text:style-name="P20"><text:span text:style-name="T11">Registro blockchain</text:span>: generación automática de registro inmutable en cada transacción crítica.</text:p>
        </text:list-item>
      </text:list>
      <text:h text:style-name="P10" text:outline-level="3" text:is-list-header="true">3.2 MS2 — Gestión Documental e Inteligencia Artificial (Python / FastAPI / AWS)</text:h>
      <text:list text:style-name="L5">
        <text:list-item>
          <text:p text:style-name="P21"><text:span text:style-name="T11">Subida y descarga de documentos</text:span>: soporte para PDF, imágenes, archivos Word, Excel y contratos.</text:p>
        </text:list-item>
        <text:list-item>
          <text:p text:style-name="P21"><text:span text:style-name="T11">Versionado de documentos</text:span>: historial completo de versiones por documento con posibilidad de restauración.</text:p>
        </text:list-item>
        <text:list-item>
          <text:p text:style-name="P21"><text:span text:style-name="T11">Auditoría de accesos</text:span>: log inmutable de cada visualización, modificación, descarga o eliminación de documentos.</text:p>
        </text:list-item>
        <text:list-item>
          <text:p text:style-name="P21"><text:span text:style-name="T11">Diagnóstico de activos por imagen (Deep Learning)</text:span>: clasificación del estado físico de un activo a partir de una fotografía mediante CNN.</text:p>
        </text:list-item>
        <text:list-item>
          <text:p text:style-name="P21"><text:soft-page-break/><text:span text:style-name="T11">Predicción de vida útil (Machine Learning supervisado)</text:span>: estimación de meses restantes y probabilidad de fallo mediante Random Forest.</text:p>
        </text:list-item>
        <text:list-item>
          <text:p text:style-name="P21"><text:span text:style-name="T11">Agrupación por comportamiento (Machine Learning no supervisado)</text:span>: clustering de activos mediante K-Means para identificar patrones de mantenimiento y anomalías.</text:p>
        </text:list-item>
      </text:list>
      <text:h text:style-name="P10" text:outline-level="3" text:is-list-header="true">3.3 MS3 — Automatización y Notificaciones (<text:span text:style-name="T14">NestJS</text:span> / Google Cloud)</text:h>
      <text:list text:style-name="L6">
        <text:list-item>
          <text:p text:style-name="P22"><text:span text:style-name="T11">Orquestación de flujos con N8N</text:span>: diseño y ejecución de flujos automatizados de múltiples pasos sin intervención manual.</text:p>
        </text:list-item>
        <text:list-item>
          <text:p text:style-name="P22"><text:span text:style-name="T11">Recepción de solicitudes por WhatsApp</text:span>: integración con WhatsApp Business API para recibir reportes de campo desde responsables de área.</text:p>
        </text:list-item>
        <text:list-item>
          <text:p text:style-name="P22"><text:span text:style-name="T11">Generación automática de órdenes de revisión o mantenimiento</text:span>: creación de tickets en el sistema a partir de eventos detectados.</text:p>
        </text:list-item>
        <text:list-item>
          <text:p text:style-name="P22"><text:span text:style-name="T11">Notificaciones por correo electrónico</text:span>: envío automático de alertas mediante SendGrid.</text:p>
        </text:list-item>
        <text:list-item>
          <text:p text:style-name="P22"><text:span text:style-name="T11">Alertas por vencimiento</text:span>: detección y notificación anticipada de vencimientos de garantías y mantenimientos programados.</text:p>
        </text:list-item>
      </text:list>
      <text:h text:style-name="P10" text:outline-level="3" text:is-list-header="true">3.4 Frontend Web — Angular</text:h>
      <text:list text:style-name="L7">
        <text:list-item>
          <text:p text:style-name="P23">Módulo de gestión de activos (registrar, asignar, trasladar, dar de baja).</text:p>
        </text:list-item>
        <text:list-item>
          <text:p text:style-name="P23">Módulo de gestión documental (subir, visualizar, descargar, auditar).</text:p>
        </text:list-item>
        <text:list-item>
          <text:p text:style-name="P23">Dashboard de Business Intelligence con gráficas interactivas.</text:p>
        </text:list-item>
        <text:list-item>
          <text:p text:style-name="P23">Módulo de auditoría y trazabilidad blockchain.</text:p>
        </text:list-item>
        <text:list-item>
          <text:p text:style-name="P23">Módulo de resultados de Machine Learning (predicciones y clustering).</text:p>
        </text:list-item>
        <text:list-item>
          <text:p text:style-name="P23">Configuración de usuarios, roles y áreas.</text:p>
        </text:list-item>
      </text:list>
      <text:h text:style-name="P10" text:outline-level="3" text:is-list-header="true">3.5 Aplicación Móvil — React Native</text:h>
      <text:list text:style-name="L8">
        <text:list-item>
          <text:p text:style-name="P24">Consulta de activos asignados al usuario autenticado.</text:p>
        </text:list-item>
        <text:list-item>
          <text:p text:style-name="P24">Fotografiar un activo y recibir diagnóstico IA en tiempo real.</text:p>
        </text:list-item>
        <text:list-item>
          <text:p text:style-name="P24">Geolocalización del activo en mapa.</text:p>
        </text:list-item>
        <text:list-item>
          <text:p text:style-name="P24">Reporte de problemas o solicitud de revisión vía WhatsApp o formulario.</text:p>
        </text:list-item>
        <text:list-item>
          <text:p text:style-name="P24">Recepción de notificaciones y alertas.</text:p>
        </text:list-item>
        <text:list-item>
          <text:p text:style-name="P24">Modo offline con caché local de activos asignados.</text:p>
        </text:list-item>
      </text:list>
      <text:h text:style-name="P13" text:outline-level="2"><text:soft-page-break/>4. Herramientas y Tecnologías</text:h>
      <text:h text:style-name="P10" text:outline-level="3">4.1 Lenguajes y Frameworks de Backend</text:h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header-rows>
          <table:table-row>
            <table:table-cell table:style-name="Tabla7.A1" office:value-type="string">
              <text:p text:style-name="P14">Componente</text:p>
            </table:table-cell>
            <table:table-cell table:style-name="Tabla7.A1" office:value-type="string">
              <text:p text:style-name="P14">Lenguaje</text:p>
            </table:table-cell>
            <table:table-cell table:style-name="Tabla7.A1" office:value-type="string">
              <text:p text:style-name="P14">Framework / Entorno</text:p>
            </table:table-cell>
            <table:table-cell table:style-name="Tabla7.D1" office:value-type="string">
              <text:p text:style-name="P14">Versión referencial</text:p>
            </table:table-cell>
          </table:table-row>
        </table:table-header-rows>
        <table:table-row>
          <table:table-cell table:style-name="Tabla7.A2" office:value-type="string">
            <text:p text:style-name="P15">MS1</text:p>
          </table:table-cell>
          <table:table-cell table:style-name="Tabla7.A2" office:value-type="string">
            <text:p text:style-name="P15">Java</text:p>
          </table:table-cell>
          <table:table-cell table:style-name="Tabla7.A2" office:value-type="string">
            <text:p text:style-name="P15">Spring Boot</text:p>
          </table:table-cell>
          <table:table-cell table:style-name="Tabla7.D2" office:value-type="string">
            <text:p text:style-name="P15">3.x</text:p>
          </table:table-cell>
        </table:table-row>
        <table:table-row>
          <table:table-cell table:style-name="Tabla7.A2" office:value-type="string">
            <text:p text:style-name="P15">MS2</text:p>
          </table:table-cell>
          <table:table-cell table:style-name="Tabla7.A2" office:value-type="string">
            <text:p text:style-name="P15">Python</text:p>
          </table:table-cell>
          <table:table-cell table:style-name="Tabla7.A2" office:value-type="string">
            <text:p text:style-name="P15">FastAPI</text:p>
          </table:table-cell>
          <table:table-cell table:style-name="Tabla7.D2" office:value-type="string">
            <text:p text:style-name="P15">0.111+</text:p>
          </table:table-cell>
        </table:table-row>
        <table:table-row>
          <table:table-cell table:style-name="Tabla7.A2" office:value-type="string">
            <text:p text:style-name="P15">MS3</text:p>
          </table:table-cell>
          <table:table-cell table:style-name="Tabla7.A2" office:value-type="string">
            <text:p text:style-name="P25">TypeScript (Node.JS)</text:p>
          </table:table-cell>
          <table:table-cell table:style-name="Tabla7.A2" office:value-type="string">
            <text:p text:style-name="P25">NestJS</text:p>
          </table:table-cell>
          <table:table-cell table:style-name="Tabla7.D2" office:value-type="string">
            <text:p text:style-name="P25">11.x</text:p>
          </table:table-cell>
        </table:table-row>
      </table:table>
      <text:p text:style-name="P11"/>
      <text:h text:style-name="P10" text:outline-level="3">4.2 Frontend y Móvil</text:h>
      <table:table table:name="Tabla8" table:style-name="Tabla8">
        <table:table-column table:style-name="Tabla8.A"/>
        <table:table-column table:style-name="Tabla8.B"/>
        <table:table-column table:style-name="Tabla8.C"/>
        <table:table-header-rows>
          <table:table-row>
            <table:table-cell table:style-name="Tabla8.A1" office:value-type="string">
              <text:p text:style-name="P14">Componente</text:p>
            </table:table-cell>
            <table:table-cell table:style-name="Tabla8.A1" office:value-type="string">
              <text:p text:style-name="P14">Tecnología</text:p>
            </table:table-cell>
            <table:table-cell table:style-name="Tabla8.C1" office:value-type="string">
              <text:p text:style-name="P14">Justificación</text:p>
            </table:table-cell>
          </table:table-row>
        </table:table-header-rows>
        <table:table-row>
          <table:table-cell table:style-name="Tabla8.A2" office:value-type="string">
            <text:p text:style-name="P15">Frontend web</text:p>
          </table:table-cell>
          <table:table-cell table:style-name="Tabla8.A2" office:value-type="string">
            <text:p text:style-name="P15">Angular</text:p>
          </table:table-cell>
          <table:table-cell table:style-name="Tabla8.C2" office:value-type="string">
            <text:p text:style-name="P15">Requisito obligatorio de la cátedra</text:p>
          </table:table-cell>
        </table:table-row>
        <table:table-row>
          <table:table-cell table:style-name="Tabla8.A2" office:value-type="string">
            <text:p text:style-name="P15">Aplicación móvil</text:p>
          </table:table-cell>
          <table:table-cell table:style-name="Tabla8.A2" office:value-type="string">
            <text:p text:style-name="P15">React Native</text:p>
          </table:table-cell>
          <table:table-cell table:style-name="Tabla8.C2" office:value-type="string">
            <text:p text:style-name="P15">Requisito obligatorio; acceso a recursos nativos del dispositivo</text:p>
          </table:table-cell>
        </table:table-row>
      </table:table>
      <text:p text:style-name="P11"/>
      <text:h text:style-name="P10" text:outline-level="3">4.3 Comunicación entre Servicios</text:h>
      <table:table table:name="Tabla9" table:style-name="Tabla9">
        <table:table-column table:style-name="Tabla9.A"/>
        <table:table-column table:style-name="Tabla9.B"/>
        <table:table-header-rows>
          <table:table-row>
            <table:table-cell table:style-name="Tabla9.A1" office:value-type="string">
              <text:p text:style-name="P14">Protocolo</text:p>
            </table:table-cell>
            <table:table-cell table:style-name="Tabla9.B1" office:value-type="string">
              <text:p text:style-name="P14">Uso</text:p>
            </table:table-cell>
          </table:table-row>
        </table:table-header-rows>
        <table:table-row>
          <table:table-cell table:style-name="Tabla9.A2" office:value-type="string">
            <text:p text:style-name="P15">GraphQL</text:p>
          </table:table-cell>
          <table:table-cell table:style-name="Tabla9.B2" office:value-type="string">
            <text:p text:style-name="P15">Comunicación exclusiva entre frontend y MS1</text:p>
          </table:table-cell>
        </table:table-row>
        <table:table-row>
          <table:table-cell table:style-name="Tabla9.A2" office:value-type="string">
            <text:p text:style-name="P15">REST</text:p>
          </table:table-cell>
          <table:table-cell table:style-name="Tabla9.B2" office:value-type="string">
            <text:p text:style-name="P15">Comunicación entre frontend y MS2 / MS3</text:p>
          </table:table-cell>
        </table:table-row>
        <table:table-row>
          <table:table-cell table:style-name="Tabla9.A2" office:value-type="string">
            <text:p text:style-name="P15">Webhooks</text:p>
          </table:table-cell>
          <table:table-cell table:style-name="Tabla9.B2" office:value-type="string">
            <text:p text:style-name="P15">Notificación de eventos de MS1 hacia MS3</text:p>
          </table:table-cell>
        </table:table-row>
      </table:table>
      <text:p text:style-name="P11"/>
      <text:h text:style-name="P10" text:outline-level="3">4.4 Bases de Datos y Almacenamiento</text:h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header-rows>
          <table:table-row>
            <table:table-cell table:style-name="Tabla10.A1" office:value-type="string">
              <text:p text:style-name="P14">Motor</text:p>
            </table:table-cell>
            <table:table-cell table:style-name="Tabla10.A1" office:value-type="string">
              <text:p text:style-name="P14">Tipo</text:p>
            </table:table-cell>
            <table:table-cell table:style-name="Tabla10.A1" office:value-type="string">
              <text:p text:style-name="P14">Proveedor</text:p>
            </table:table-cell>
            <table:table-cell table:style-name="Tabla10.D1" office:value-type="string">
              <text:p text:style-name="P14">Uso principal</text:p>
            </table:table-cell>
          </table:table-row>
        </table:table-header-rows>
        <table:table-row>
          <table:table-cell table:style-name="Tabla10.A2" office:value-type="string">
            <text:p text:style-name="P15">PostgreSQL</text:p>
          </table:table-cell>
          <table:table-cell table:style-name="Tabla10.A2" office:value-type="string">
            <text:p text:style-name="P15">Relacional</text:p>
          </table:table-cell>
          <table:table-cell table:style-name="Tabla10.A2" office:value-type="string">
            <text:p text:style-name="P15">Azure</text:p>
          </table:table-cell>
          <table:table-cell table:style-name="Tabla10.D2" office:value-type="string">
            <text:p text:style-name="P15">Datos de activos, asignaciones, usuarios</text:p>
          </table:table-cell>
        </table:table-row>
        <table:table-row>
          <table:table-cell table:style-name="Tabla10.A2" office:value-type="string">
            <text:p text:style-name="P15">DynamoDB</text:p>
          </table:table-cell>
          <table:table-cell table:style-name="Tabla10.A2" office:value-type="string">
            <text:p text:style-name="P15">NoSQL</text:p>
          </table:table-cell>
          <table:table-cell table:style-name="Tabla10.A2" office:value-type="string">
            <text:p text:style-name="P15">AWS</text:p>
          </table:table-cell>
          <table:table-cell table:style-name="Tabla10.D2" office:value-type="string">
            <text:p text:style-name="P15">Metadatos de documentos y auditoría</text:p>
          </table:table-cell>
        </table:table-row>
        <table:table-row>
          <table:table-cell table:style-name="Tabla10.A2" office:value-type="string">
            <text:p text:style-name="P15">Amazon S3</text:p>
          </table:table-cell>
          <table:table-cell table:style-name="Tabla10.A2" office:value-type="string">
            <text:p text:style-name="P15">Objetos</text:p>
          </table:table-cell>
          <table:table-cell table:style-name="Tabla10.A2" office:value-type="string">
            <text:p text:style-name="P15">AWS</text:p>
          </table:table-cell>
          <table:table-cell table:style-name="Tabla10.D2" office:value-type="string">
            <text:p text:style-name="P15">Archivos físicos (PDF, imágenes, contratos)</text:p>
          </table:table-cell>
        </table:table-row>
      </table:table>
      <text:p text:style-name="P11"/>
      <text:h text:style-name="P10" text:outline-level="3">4.5 Inteligencia Artificial y Machine Learning</text:h>
      <table:table table:name="Tabla11" table:style-name="Tabla11">
        <table:table-column table:style-name="Tabla11.A"/>
        <table:table-column table:style-name="Tabla11.B"/>
        <table:table-column table:style-name="Tabla11.C"/>
        <table:table-header-rows>
          <table:table-row>
            <table:table-cell table:style-name="Tabla11.A1" office:value-type="string">
              <text:p text:style-name="P14">Modelo / Biblioteca</text:p>
            </table:table-cell>
            <table:table-cell table:style-name="Tabla11.A1" office:value-type="string">
              <text:p text:style-name="P14">Tipo</text:p>
            </table:table-cell>
            <table:table-cell table:style-name="Tabla11.C1" office:value-type="string">
              <text:p text:style-name="P14">Aplicación</text:p>
            </table:table-cell>
          </table:table-row>
        </table:table-header-rows>
        <table:table-row>
          <table:table-cell table:style-name="Tabla11.A2" office:value-type="string">
            <text:p text:style-name="P15">CNN (TensorFlow / Keras)</text:p>
          </table:table-cell>
          <table:table-cell table:style-name="Tabla11.A2" office:value-type="string">
            <text:p text:style-name="P15">Deep Learning</text:p>
          </table:table-cell>
          <table:table-cell table:style-name="Tabla11.C2" office:value-type="string">
            <text:p text:style-name="P15">Diagnóstico de estado físico de activos por imagen</text:p>
          </table:table-cell>
        </table:table-row>
        <table:table-row>
          <table:table-cell table:style-name="Tabla11.A2" office:value-type="string">
            <text:p text:style-name="P15">Random Forest (scikit-learn)</text:p>
          </table:table-cell>
          <table:table-cell table:style-name="Tabla11.A2" office:value-type="string">
            <text:p text:style-name="P15">ML Supervisado</text:p>
          </table:table-cell>
          <table:table-cell table:style-name="Tabla11.C2" office:value-type="string">
            <text:p text:style-name="P15">Predicción de vida útil restante</text:p>
          </table:table-cell>
        </table:table-row>
        <table:table-row>
          <table:table-cell table:style-name="Tabla11.A2" office:value-type="string">
            <text:p text:style-name="P15">K-Means (scikit-learn)</text:p>
          </table:table-cell>
          <table:table-cell table:style-name="Tabla11.A2" office:value-type="string">
            <text:p text:style-name="P15">ML No Supervisado</text:p>
          </table:table-cell>
          <table:table-cell table:style-name="Tabla11.C2" office:value-type="string">
            <text:p text:style-name="P15">Agrupación de activos por patrones de uso</text:p>
          </table:table-cell>
        </table:table-row>
      </table:table>
      <text:p text:style-name="P11"><text:soft-page-break/></text:p>
      <text:h text:style-name="P10" text:outline-level="3">4.6 Infraestructura y Despliegue</text:h>
      <table:table table:name="Tabla12" table:style-name="Tabla12">
        <table:table-column table:style-name="Tabla12.A"/>
        <table:table-column table:style-name="Tabla12.B"/>
        <table:table-column table:style-name="Tabla12.C"/>
        <table:table-header-rows>
          <table:table-row>
            <table:table-cell table:style-name="Tabla12.A1" office:value-type="string">
              <text:p text:style-name="P14">Componente</text:p>
            </table:table-cell>
            <table:table-cell table:style-name="Tabla12.A1" office:value-type="string">
              <text:p text:style-name="P14">Proveedor</text:p>
            </table:table-cell>
            <table:table-cell table:style-name="Tabla12.C1" office:value-type="string">
              <text:p text:style-name="P14">Servicio</text:p>
            </table:table-cell>
          </table:table-row>
        </table:table-header-rows>
        <table:table-row>
          <table:table-cell table:style-name="Tabla12.A2" office:value-type="string">
            <text:p text:style-name="P15">MS1</text:p>
          </table:table-cell>
          <table:table-cell table:style-name="Tabla12.A2" office:value-type="string">
            <text:p text:style-name="P15">Microsoft Azure</text:p>
          </table:table-cell>
          <table:table-cell table:style-name="Tabla12.C2" office:value-type="string">
            <text:p text:style-name="P15">Azure App Service</text:p>
          </table:table-cell>
        </table:table-row>
        <table:table-row>
          <table:table-cell table:style-name="Tabla12.A2" office:value-type="string">
            <text:p text:style-name="P15">MS2</text:p>
          </table:table-cell>
          <table:table-cell table:style-name="Tabla12.A2" office:value-type="string">
            <text:p text:style-name="P15">Amazon Web Services</text:p>
          </table:table-cell>
          <table:table-cell table:style-name="Tabla12.C2" office:value-type="string">
            <text:p text:style-name="P15">AWS Lambda / ECS</text:p>
          </table:table-cell>
        </table:table-row>
        <table:table-row>
          <table:table-cell table:style-name="Tabla12.A2" office:value-type="string">
            <text:p text:style-name="P15">MS3</text:p>
          </table:table-cell>
          <table:table-cell table:style-name="Tabla12.A2" office:value-type="string">
            <text:p text:style-name="P15">Google Cloud Platform</text:p>
          </table:table-cell>
          <table:table-cell table:style-name="Tabla12.C2" office:value-type="string">
            <text:p text:style-name="P15">Cloud Run</text:p>
          </table:table-cell>
        </table:table-row>
      </table:table>
      <text:p text:style-name="P11"/>
      <text:h text:style-name="P10" text:outline-level="3">4.7 Herramientas de Automatización e Integración</text:h>
      <table:table table:name="Tabla13" table:style-name="Tabla13">
        <table:table-column table:style-name="Tabla13.A"/>
        <table:table-column table:style-name="Tabla13.B"/>
        <table:table-header-rows>
          <table:table-row>
            <table:table-cell table:style-name="Tabla13.A1" office:value-type="string">
              <text:p text:style-name="P14">Herramienta</text:p>
            </table:table-cell>
            <table:table-cell table:style-name="Tabla13.B1" office:value-type="string">
              <text:p text:style-name="P14">Uso</text:p>
            </table:table-cell>
          </table:table-row>
        </table:table-header-rows>
        <table:table-row>
          <table:table-cell table:style-name="Tabla13.A2" office:value-type="string">
            <text:p text:style-name="P15">N8N</text:p>
          </table:table-cell>
          <table:table-cell table:style-name="Tabla13.B2" office:value-type="string">
            <text:p text:style-name="P15">Orquestación de flujos automatizados</text:p>
          </table:table-cell>
        </table:table-row>
        <table:table-row>
          <table:table-cell table:style-name="Tabla13.A2" office:value-type="string">
            <text:p text:style-name="P15">SendGrid</text:p>
          </table:table-cell>
          <table:table-cell table:style-name="Tabla13.B2" office:value-type="string">
            <text:p text:style-name="P15">Envío de notificaciones por correo electrónico</text:p>
          </table:table-cell>
        </table:table-row>
        <table:table-row>
          <table:table-cell table:style-name="Tabla13.A2" office:value-type="string">
            <text:p text:style-name="P15">WhatsApp Business API</text:p>
          </table:table-cell>
          <table:table-cell table:style-name="Tabla13.B2" office:value-type="string">
            <text:p text:style-name="P15">Recepción de solicitudes desde dispositivos móviles</text:p>
          </table:table-cell>
        </table:table-row>
        <table:table-row>
          <table:table-cell table:style-name="Tabla13.A2" office:value-type="string">
            <text:p text:style-name="P15">Web3j / Hyperledger SDK</text:p>
          </table:table-cell>
          <table:table-cell table:style-name="Tabla13.B2" office:value-type="string">
            <text:p text:style-name="P15">Integración con red blockchain</text:p>
          </table:table-cell>
        </table:table-row>
      </table:table>
      <text:p text:style-name="P11"/>
      <text:h text:style-name="P10" text:outline-level="3">4.8 Modelado y Metodología</text:h>
      <table:table table:name="Tabla14" table:style-name="Tabla14">
        <table:table-column table:style-name="Tabla14.A"/>
        <table:table-column table:style-name="Tabla14.B"/>
        <table:table-header-rows>
          <table:table-row>
            <table:table-cell table:style-name="Tabla14.A1" office:value-type="string">
              <text:p text:style-name="P14">Herramienta / Enfoque</text:p>
            </table:table-cell>
            <table:table-cell table:style-name="Tabla14.B1" office:value-type="string">
              <text:p text:style-name="P14">Uso</text:p>
            </table:table-cell>
          </table:table-row>
        </table:table-header-rows>
        <table:table-row>
          <table:table-cell table:style-name="Tabla14.A2" office:value-type="string">
            <text:p text:style-name="P15">Modelo C4</text:p>
          </table:table-cell>
          <table:table-cell table:style-name="Tabla14.B2" office:value-type="string">
            <text:p text:style-name="P15">Diagramas de contexto y contenedores</text:p>
          </table:table-cell>
        </table:table-row>
        <table:table-row>
          <table:table-cell table:style-name="Tabla14.A2" office:value-type="string">
            <text:p text:style-name="P15">UML</text:p>
          </table:table-cell>
          <table:table-cell table:style-name="Tabla14.B2" office:value-type="string">
            <text:p text:style-name="P15">Clases, componentes, casos de uso, secuencia, actividad, estados</text:p>
          </table:table-cell>
        </table:table-row>
        <table:table-row>
          <table:table-cell table:style-name="Tabla14.A2" office:value-type="string">
            <text:p text:style-name="P15">Proceso Unificado</text:p>
          </table:table-cell>
          <table:table-cell table:style-name="Tabla14.B2" office:value-type="string">
            <text:p text:style-name="P15">Metodología de desarrollo iterativa e incremental</text:p>
          </table:table-cell>
        </table:table-row>
      </table:table>
      <text:p text:style-name="P11"/>
      <text:p text:style-name="P26"/>
      <text:h text:style-name="P13" text:outline-level="2">5. Ejemplos de Funcionamiento del Sistema</text:h>
      <text:p text:style-name="P11">A continuación se presentan cinco escenarios concretos que ilustran el funcionamiento integrado del sistema.</text:p>
      <text:h text:style-name="P10" text:outline-level="3">Ejemplo 1: Registro y asignación de un activo nuevo</text:h>
      <text:p text:style-name="P11"><text:span text:style-name="T11">Contexto</text:span>: El administrador incorpora una nueva computadora portátil al inventario y la asigna al jefe del área de contabilidad.</text:p>
      <text:p text:style-name="P11"><text:span text:style-name="T11">Flujo de operación:</text:span></text:p>
      <text:list text:style-name="L9">
        <text:list-item>
          <text:p text:style-name="P27">El administrador accede al <text:span text:style-name="T11">frontend web Angular</text:span> e ingresa al módulo de gestión de activos.</text:p>
        </text:list-item>
        <text:list-item>
          <text:p text:style-name="P27">Completa el formulario de registro (código: <text:span text:style-name="T13">LAP-2026-045</text:span>, descripción: "Laptop Dell Inspiron 15", valor de adquisición: Bs. 8.500, vida útil: 5 años, categoría: Equipo de Cómputo) <text:soft-page-break/>y envía la solicitud mediante una <text:span text:style-name="T11">mutación GraphQL</text:span> al MS1.</text:p>
        </text:list-item>
        <text:list-item>
          <text:p text:style-name="P27">El <text:span text:style-name="T11">MS1 persiste el activo en PostgreSQL</text:span>, calcula la tasa de depreciación mensual (Bs. 141,67) y genera un <text:span text:style-name="T11">registro blockchain</text:span> con el hash de la transacción de adquisición.</text:p>
        </text:list-item>
        <text:list-item>
          <text:p text:style-name="P27">El administrador selecciona el activo recién creado y ejecuta la acción de asignación, indicando responsable y área destino.</text:p>
        </text:list-item>
        <text:list-item>
          <text:p text:style-name="P27">El MS1 registra la asignación, genera un nuevo <text:span text:style-name="T11">registro blockchain</text:span> (tipo: ASIGNACION) y envía un <text:span text:style-name="T11">webhook al MS3</text:span>.</text:p>
        </text:list-item>
        <text:list-item>
          <text:p text:style-name="P27">El <text:span text:style-name="T11">MS3 / N8N</text:span> detecta el evento y envía automáticamente un <text:span text:style-name="T11">correo electrónico de notificación</text:span> al responsable del área informando la asignación.</text:p>
        </text:list-item>
        <text:list-item>
          <text:p text:style-name="P27">El responsable recibe la notificación en su bandeja de entrada y puede consultar el activo desde la <text:span text:style-name="T11">aplicación móvil React Native</text:span>.</text:p>
        </text:list-item>
      </text:list>
      <text:p text:style-name="P11"><text:span text:style-name="T11">Resultado</text:span>: El activo queda registrado, asignado y con trazabilidad inmutable en blockchain; el responsable es notificado automáticamente.</text:p>
      <text:h text:style-name="P10" text:outline-level="3">Ejemplo 2: Diagnóstico de estado de un activo por fotografía (IA en app móvil)</text:h>
      <text:p text:style-name="P11"><text:span text:style-name="T11">Contexto</text:span>: El responsable del área de almacén detecta que un montacargas tiene aspecto deteriorado y desea registrar su estado en el sistema.</text:p>
      <text:p text:style-name="P11"><text:span text:style-name="T11">Flujo de operación:</text:span></text:p>
      <text:list text:style-name="L10">
        <text:list-item>
          <text:p text:style-name="P28">El responsable abre la <text:span text:style-name="T11">aplicación móvil React Native</text:span> y selecciona el activo <text:span text:style-name="T13">MONT-2022-003</text:span> desde su lista de activos asignados.</text:p>
        </text:list-item>
        <text:list-item>
          <text:p text:style-name="P28">Pulsa la opción "Diagnosticar con IA" y la app activa la <text:span text:style-name="T11">cámara del dispositivo</text:span>.</text:p>
        </text:list-item>
        <text:list-item>
          <text:p text:style-name="P28">El responsable fotografía el montacargas. La app comprime la imagen, registra las <text:span text:style-name="T11">coordenadas GPS</text:span> actuales del dispositivo y envía la solicitud al <text:span text:style-name="T11">MS2 mediante REST</text:span>.</text:p>
        </text:list-item>
        <text:list-item>
          <text:p text:style-name="P28">El <text:span text:style-name="T11">MS2</text:span> almacena la imagen en <text:span text:style-name="T11">Amazon S3</text:span>, obtiene su URL y la procesa con el <text:span text:style-name="T11">modelo CNN de Deep Learning</text:span>.</text:p>
        </text:list-item>
        <text:list-item>
          <text:p text:style-name="P28">El modelo clasifica la imagen y devuelve: <text:span text:style-name="T13">estado: "deteriorado"</text:span>, <text:span text:style-name="T13">confianza: 92%</text:span>, <text:span text:style-name="T13">detalle: "Oxidación detectada en estructura lateral"</text:span>.</text:p>
        </text:list-item>
        <text:list-item>
          <text:p text:style-name="P28">El MS2 guarda el resultado del diagnóstico en <text:span text:style-name="T11">DynamoDB</text:span> con el ID del activo, la URL de la imagen, el resultado y la ubicación GPS.</text:p>
        </text:list-item>
        <text:list-item>
          <text:p text:style-name="P28">La app muestra al responsable: <text:span text:style-name="T11">"Estado: Deteriorado — Confianza: 92% — Recomendación: Programar mantenimiento preventivo de inmediato"</text:span>.</text:p>
        </text:list-item>
        <text:list-item>
          <text:p text:style-name="P28">El MS2 notifica al <text:span text:style-name="T11">MS3</text:span>, el cual genera automáticamente una <text:span text:style-name="T11">orden de mantenimiento</text:span> en el MS1 y envía un correo al administrador.</text:p>
        </text:list-item>
      </text:list>
      <text:p text:style-name="P11"><text:span text:style-name="T11">Resultado</text:span>: El diagnóstico queda registrado con evidencia fotográfica, geolocalización y trazabilidad <text:soft-page-break/>completa, sin intervención manual adicional.</text:p>
      <text:h text:style-name="P10" text:outline-level="3">Ejemplo 3: Flujo de automatización por vencimiento de garantía</text:h>
      <text:p text:style-name="P11"><text:span text:style-name="T11">Contexto</text:span>: El sistema detecta que la garantía de un servidor rack vence en 15 días.</text:p>
      <text:p text:style-name="P11"><text:span text:style-name="T11">Flujo de operación:</text:span></text:p>
      <text:list text:style-name="L11">
        <text:list-item>
          <text:p text:style-name="P29">Un proceso programado en el <text:span text:style-name="T11">MS1</text:span> identifica que el activo <text:span text:style-name="T13">SRV-2024-007</text:span> tiene garantía con vencimiento en 15 días.</text:p>
        </text:list-item>
        <text:list-item>
          <text:p text:style-name="P29">El MS1 dispara un <text:span text:style-name="T11">webhook hacia el MS3</text:span>.</text:p>
        </text:list-item>
        <text:list-item>
          <text:p text:style-name="P30">El <text:span text:style-name="T11">N8N</text:span> recibe el evento e inicia el flujo automatizado:</text:p>
          <text:list>
            <text:list-item>
              <text:p text:style-name="P29"><text:span text:style-name="T11">Paso 1</text:span>: Consulta al <text:span text:style-name="T11">MS2</text:span> si el contrato de garantía está cargado y vigente en el sistema documental.</text:p>
            </text:list-item>
            <text:list-item>
              <text:p text:style-name="P29"><text:span text:style-name="T11">Paso 2</text:span>: El MS2 confirma que el documento existe y está actualizado; N8N marca la revisión como "Lista para ejecutar".</text:p>
            </text:list-item>
            <text:list-item>
              <text:p text:style-name="P29"><text:span text:style-name="T11">Paso 3</text:span>: N8N genera una <text:span text:style-name="T11">orden de revisión de garantía</text:span> en el MS1 asignada al responsable del activo.</text:p>
            </text:list-item>
            <text:list-item>
              <text:p text:style-name="P29"><text:span text:style-name="T11">Paso 4</text:span>: N8N envía un <text:span text:style-name="T11">correo electrónico</text:span> al responsable vía SendGrid: <text:span text:style-name="T12">"El activo SRV-2024-007 tiene garantía por vencer el 16/06/2026. Se ha generado la orden de revisión #ORD-2026-089"</text:span>.</text:p>
            </text:list-item>
            <text:list-item>
              <text:p text:style-name="P29"><text:span text:style-name="T11">Paso 5</text:span>: N8N envía una <text:span text:style-name="T11">notificación push</text:span> a la app móvil del responsable.</text:p>
            </text:list-item>
          </text:list>
        </text:list-item>
      </text:list>
      <text:p text:style-name="P11"><text:span text:style-name="T11">Resultado</text:span>: El proceso se ejecuta completamente de forma automática, sin intervención del administrador, garantizando que los vencimientos nunca sean ignorados.</text:p>
      <text:h text:style-name="P10" text:outline-level="3">Ejemplo 4: Consulta de predicción de vida útil (Machine Learning)</text:h>
      <text:p text:style-name="P11"><text:span text:style-name="T11">Contexto</text:span>: El administrador desea conocer el estado proyectado del inventario de equipos de aire acondicionado para planificar el presupuesto de mantenimiento del siguiente año.</text:p>
      <text:p text:style-name="P11"><text:span text:style-name="T11">Flujo de operación:</text:span></text:p>
      <text:list text:style-name="L12">
        <text:list-item>
          <text:p text:style-name="P31">El administrador accede al <text:span text:style-name="T11">frontend Angular</text:span>, módulo de Machine Learning, y selecciona la categoría "Climatización".</text:p>
        </text:list-item>
        <text:list-item>
          <text:p text:style-name="P31">El frontend envía una solicitud <text:span text:style-name="T11">REST al MS2</text:span>: <text:span text:style-name="T13">GET /ml/prediccion-vida-util?categoriaId=CLI</text:span>.</text:p>
        </text:list-item>
        <text:list-item>
          <text:p text:style-name="P31">El <text:span text:style-name="T11">MS2</text:span> recopila el historial de cada activo de la categoría (edad, número de mantenimientos, resultados de diagnósticos IA previos) desde DynamoDB.</text:p>
        </text:list-item>
        <text:list-item>
          <text:p text:style-name="P31">El modelo <text:span text:style-name="T11">Random Forest</text:span> predice para cada activo los meses de vida útil restante y la probabilidad de fallo en los próximos 6 meses.</text:p>
        </text:list-item>
        <text:list-item>
          <text:p text:style-name="P31">Paralelamente, el modelo <text:span text:style-name="T11">K-Means</text:span> agrupa los activos en tres clústeres: "Alta criticidad", <text:soft-page-break/>"Mantenimiento regular" y "Rendimiento eficiente".</text:p>
        </text:list-item>
        <text:list-item>
          <text:p text:style-name="P31">El frontend renderiza los resultados: una tabla con la predicción individual y un gráfico de dispersión con los tres grupos identificados.</text:p>
        </text:list-item>
        <text:list-item>
          <text:p text:style-name="P31">El administrador identifica los 4 activos en el clúster "Alta criticidad" y programa mantenimiento preventivo prioritario para ellos.</text:p>
        </text:list-item>
      </text:list>
      <text:p text:style-name="P11"><text:span text:style-name="T11">Resultado</text:span>: La toma de decisiones sobre mantenimiento se basa en predicciones cuantitativas, reduciendo el riesgo de fallos inesperados y optimizando el presupuesto.</text:p>
      <text:h text:style-name="P10" text:outline-level="3">Ejemplo 5: Solicitud de revisión por WhatsApp</text:h>
      <text:p text:style-name="P11"><text:span text:style-name="T11">Contexto</text:span>: Un responsable de área detecta un problema en una fotocopiadora y lo reporta desde su teléfono sin acceder a ninguna aplicación.</text:p>
      <text:p text:style-name="P11"><text:span text:style-name="T11">Flujo de operación:</text:span></text:p>
      <text:list text:style-name="L13">
        <text:list-item>
          <text:p text:style-name="P32">El responsable envía un mensaje por <text:span text:style-name="T11">WhatsApp</text:span> al número del sistema: <text:span text:style-name="T12">"Activo COD-123 requiere revisión urgente"</text:span>.</text:p>
        </text:list-item>
        <text:list-item>
          <text:p text:style-name="P32">La <text:span text:style-name="T11">WhatsApp Business API</text:span> recibe el mensaje y lo reenvía al <text:span text:style-name="T11">MS3 / N8N</text:span>.</text:p>
        </text:list-item>
        <text:list-item>
          <text:p text:style-name="P32">El N8N interpreta el código del activo mediante procesamiento de texto y consulta al <text:span text:style-name="T11">MS1</text:span>: <text:span text:style-name="T13">GET /activos/COD-123</text:span>.</text:p>
        </text:list-item>
        <text:list-item>
          <text:p text:style-name="P32">El MS1 confirma que el activo existe y está activo; devuelve sus datos al N8N.</text:p>
        </text:list-item>
        <text:list-item>
          <text:p text:style-name="P32">El N8N crea automáticamente un <text:span text:style-name="T11">ticket de revisión</text:span> en el MS1 vinculado al activo COD-123 y al responsable identificado.</text:p>
        </text:list-item>
        <text:list-item>
          <text:p text:style-name="P32">El N8N envía un <text:span text:style-name="T11">correo electrónico de confirmación</text:span> al responsable: <text:span text:style-name="T12">"Solicitud recibida para el activo COD-123. Número de ticket: TKT-2026-412"</text:span>.</text:p>
        </text:list-item>
        <text:list-item>
          <text:p text:style-name="P32">El N8N responde al <text:span text:style-name="T11">WhatsApp</text:span> del responsable: <text:span text:style-name="T12">"Su solicitud ha sido registrada. Número de ticket: TKT-2026-412. El equipo de mantenimiento será notificado."</text:span></text:p>
        </text:list-item>
      </text:list>
      <text:p text:style-name="P11"><text:span text:style-name="T11">Resultado</text:span>: El responsable reporta el problema en segundos desde WhatsApp; el sistema registra el ticket, notifica por correo y confirma la recepción automáticamente, sin que ningún operador humano interveng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rial" svg:font-family="Arial, sans-serif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SV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SV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rst_20_Paragraph" style:display-name="First Paragraph" style:family="paragraph" style:parent-style-name="Text_20_body" style:next-style-name="Text_20_body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28" style:display-name="ListLabel 28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6-01T22:51:29.143324667</dc:date>
    <meta:editing-duration>PT1H25M12S</meta:editing-duration>
    <meta:editing-cycles>4</meta:editing-cycles>
    <meta:generator>LibreOffice/26.2.3.2$Linux_X86_64 LibreOffice_project/620$Build-2</meta:generator>
    <meta:print-date>2026-06-01T21:34:34.089138257</meta:print-date>
    <meta:printed-by>Archivos PDF</meta:printed-by>
    <meta:document-statistic meta:table-count="14" meta:image-count="2" meta:object-count="0" meta:page-count="13" meta:paragraph-count="318" meta:word-count="2983" meta:character-count="19794" meta:non-whitespace-character-count="17187"/>
  </office:meta>
</office:document-meta>
</file>