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A000004BA9217221A.png" manifest:media-type="image/png"/>
  <manifest:file-entry manifest:full-path="Pictures/10000001000002AF0000037C6F6732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rial" svg:font-family="Arial, sans-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544cm" style:rel-column-width="20655*"/>
    </style:style>
    <style:style style:name="Tabla1.B" style:family="table-column">
      <style:table-column-properties style:column-width="6.182cm" style:rel-column-width="23034*"/>
    </style:style>
    <style:style style:name="Tabla1.C" style:family="table-column">
      <style:table-column-properties style:column-width="5.863cm" style:rel-column-width="21846*"/>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2" style:family="table">
      <style:table-properties style:width="17.59cm" table:align="margins"/>
    </style:style>
    <style:style style:name="Tabla2.A" style:family="table-column">
      <style:table-column-properties style:column-width="4.016cm" style:rel-column-width="14964*"/>
    </style:style>
    <style:style style:name="Tabla2.B" style:family="table-column">
      <style:table-column-properties style:column-width="13.573cm" style:rel-column-width="50571*"/>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59cm" table:align="margins"/>
    </style:style>
    <style:style style:name="Tabla3.A" style:family="table-column">
      <style:table-column-properties style:column-width="4.685cm" style:rel-column-width="17454*"/>
    </style:style>
    <style:style style:name="Tabla3.B" style:family="table-column">
      <style:table-column-properties style:column-width="4.11cm" style:rel-column-width="15312*"/>
    </style:style>
    <style:style style:name="Tabla3.C" style:family="table-column">
      <style:table-column-properties style:column-width="4.397cm" style:rel-column-width="16383*"/>
    </style:style>
    <style:style style:name="Tabla3.D" style:family="table-column">
      <style:table-column-properties style:column-width="4.397cm" style:rel-column-width="16386*"/>
    </style:style>
    <style:style style:name="Tabla3.A1" style:family="table-cell">
      <style:table-cell-properties fo:padding="0.097cm" fo:border-left="0.5pt solid #000000" fo:border-right="none" fo:border-top="0.5pt solid #000000" fo:border-bottom="0.5pt solid #000000"/>
    </style:style>
    <style:style style:name="Tabla3.D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4" style:family="table">
      <style:table-properties style:width="17.59cm" table:align="margins"/>
    </style:style>
    <style:style style:name="Tabla4.A" style:family="table-column">
      <style:table-column-properties style:column-width="4.209cm" style:rel-column-width="15680*"/>
    </style:style>
    <style:style style:name="Tabla4.B" style:family="table-column">
      <style:table-column-properties style:column-width="3.517cm" style:rel-column-width="13104*"/>
    </style:style>
    <style:style style:name="Tabla4.E" style:family="table-column">
      <style:table-column-properties style:column-width="2.829cm" style:rel-column-width="10543*"/>
    </style:style>
    <style:style style:name="Tabla4.A1" style:family="table-cell">
      <style:table-cell-properties fo:padding="0.097cm" fo:border-left="0.5pt solid #000000" fo:border-right="none" fo:border-top="0.5pt solid #000000" fo:border-bottom="0.5pt solid #000000"/>
    </style:style>
    <style:style style:name="Tabla4.E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E2" style:family="table-cell">
      <style:table-cell-properties fo:padding="0.097cm" fo:border-left="0.5pt solid #000000" fo:border-right="0.5pt solid #000000" fo:border-top="none" fo:border-bottom="0.5pt solid #000000"/>
    </style:style>
    <style:style style:name="Tabla5" style:family="table">
      <style:table-properties style:width="17.59cm" table:align="margins"/>
    </style:style>
    <style:style style:name="Tabla5.A" style:family="table-column">
      <style:table-column-properties style:column-width="6.638cm" style:rel-column-width="24730*"/>
    </style:style>
    <style:style style:name="Tabla5.B" style:family="table-column">
      <style:table-column-properties style:column-width="2.605cm" style:rel-column-width="9706*"/>
    </style:style>
    <style:style style:name="Tabla5.C" style:family="table-column">
      <style:table-column-properties style:column-width="3.5cm" style:rel-column-width="13038*"/>
    </style:style>
    <style:style style:name="Tabla5.D" style:family="table-column">
      <style:table-column-properties style:column-width="4.847cm" style:rel-column-width="18061*"/>
    </style:style>
    <style:style style:name="Tabla5.A1" style:family="table-cell">
      <style:table-cell-properties fo:padding="0.097cm" fo:border-left="0.5pt solid #000000" fo:border-right="none" fo:border-top="0.5pt solid #000000" fo:border-bottom="0.5pt solid #000000"/>
    </style:style>
    <style:style style:name="Tabla5.D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6" style:family="table">
      <style:table-properties style:width="17.59cm" table:align="margins"/>
    </style:style>
    <style:style style:name="Tabla6.A" style:family="table-column">
      <style:table-column-properties style:column-width="9.128cm" style:rel-column-width="34009*"/>
    </style:style>
    <style:style style:name="Tabla6.B" style:family="table-column">
      <style:table-column-properties style:column-width="2.441cm" style:rel-column-width="9095*"/>
    </style:style>
    <style:style style:name="Tabla6.C" style:family="table-column">
      <style:table-column-properties style:column-width="6.02cm" style:rel-column-width="22431*"/>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7" style:family="table">
      <style:table-properties style:width="17.59cm" table:align="margins"/>
    </style:style>
    <style:style style:name="Tabla7.A" style:family="table-column">
      <style:table-column-properties style:column-width="7.664cm" style:rel-column-width="28554*"/>
    </style:style>
    <style:style style:name="Tabla7.B" style:family="table-column">
      <style:table-column-properties style:column-width="2.605cm" style:rel-column-width="9706*"/>
    </style:style>
    <style:style style:name="Tabla7.C" style:family="table-column">
      <style:table-column-properties style:column-width="2.923cm" style:rel-column-width="10889*"/>
    </style:style>
    <style:style style:name="Tabla7.D" style:family="table-column">
      <style:table-column-properties style:column-width="4.397cm" style:rel-column-width="16386*"/>
    </style:style>
    <style:style style:name="Tabla7.A1" style:family="table-cell">
      <style:table-cell-properties fo:padding="0.097cm" fo:border-left="0.5pt solid #000000" fo:border-right="none" fo:border-top="0.5pt solid #000000" fo:border-bottom="0.5pt solid #000000"/>
    </style:style>
    <style:style style:name="Tabla7.D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8" style:family="table">
      <style:table-properties style:width="17.59cm" table:align="margins"/>
    </style:style>
    <style:style style:name="Tabla8.A" style:family="table-column">
      <style:table-column-properties style:column-width="1.383cm" style:rel-column-width="5152*"/>
    </style:style>
    <style:style style:name="Tabla8.B" style:family="table-column">
      <style:table-column-properties style:column-width="7.412cm" style:rel-column-width="27615*"/>
    </style:style>
    <style:style style:name="Tabla8.C" style:family="table-column">
      <style:table-column-properties style:column-width="4.397cm" style:rel-column-width="16383*"/>
    </style:style>
    <style:style style:name="Tabla8.D" style:family="table-column">
      <style:table-column-properties style:column-width="4.397cm" style:rel-column-width="16385*"/>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9" style:family="table">
      <style:table-properties style:width="17.59cm" table:align="margins"/>
    </style:style>
    <style:style style:name="Tabla9.A" style:family="table-column">
      <style:table-column-properties style:column-width="4.685cm" style:rel-column-width="17454*"/>
    </style:style>
    <style:style style:name="Tabla9.B" style:family="table-column">
      <style:table-column-properties style:column-width="4.397cm" style:rel-column-width="16383*"/>
    </style:style>
    <style:style style:name="Tabla9.C" style:family="table-column">
      <style:table-column-properties style:column-width="4.11cm" style:rel-column-width="15312*"/>
    </style:style>
    <style:style style:name="Tabla9.D" style:family="table-column">
      <style:table-column-properties style:column-width="4.397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officeooo:paragraph-rsid="00096de3"/>
    </style:style>
    <style:style style:name="P2" style:family="paragraph" style:parent-style-name="Text_20_body">
      <style:text-properties style:use-window-font-color="true" loext:opacity="0%" officeooo:paragraph-rsid="00096de3"/>
    </style:style>
    <style:style style:name="P3" style:family="paragraph" style:parent-style-name="First_20_Paragraph">
      <style:paragraph-properties fo:margin-left="0cm" fo:margin-right="0cm" fo:margin-top="0cm" fo:margin-bottom="0cm" style:contextual-spacing="false" fo:line-height="138%" fo:text-align="center" style:justify-single-word="false" fo:text-indent="0cm" style:auto-text-indent="false" style:writing-mode="lr-tb" style:writing-mode-automatic="false"/>
      <style:text-properties officeooo:rsid="000d7b76" officeooo:paragraph-rsid="000d7b76"/>
    </style:style>
    <style:style style:name="P4" style:family="paragraph" style:parent-style-name="Text_20_body">
      <style:text-properties officeooo:paragraph-rsid="00096de3"/>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style:text-line-through-style="none" style:text-line-through-type="none" style:font-name="Arial" fo:font-size="11pt" fo:font-style="normal" style:text-underline-style="none" fo:font-weight="normal" officeooo:paragraph-rsid="00096de3" style:text-blinking="false" fo:background-color="transparent" style:font-size-asian="11pt" style:font-style-asian="normal" style:font-weight-asian="normal"/>
    </style:style>
    <style:style style:name="P6"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0096de3"/>
    </style:style>
    <style:style style:name="P7" style:family="paragraph" style:parent-style-name="Text_20_body" style:list-style-name="WWNum4">
      <style:paragraph-properties fo:margin-top="0cm" fo:margin-bottom="0cm" style:contextual-spacing="false" fo:line-height="138%" style:writing-mode="lr-tb"/>
      <style:text-properties officeooo:paragraph-rsid="00096de3"/>
    </style:style>
    <style:style style:name="P8" style:family="paragraph" style:parent-style-name="Text_20_body" style:list-style-name="WWNum4">
      <style:paragraph-properties fo:margin-top="0cm" fo:margin-bottom="0cm" style:contextual-spacing="false" fo:line-height="138%" style:writing-mode="lr-tb"/>
      <style:text-properties fo:font-variant="normal" fo:text-transform="none" style:use-window-font-color="true" loext:opacity="0%" style:text-line-through-style="none" style:text-line-through-type="none" style:font-name="Arial" fo:font-size="11pt" fo:font-style="normal" style:text-underline-style="none" fo:font-weight="normal" officeooo:paragraph-rsid="00096de3" style:text-blinking="false" fo:background-color="transparent" style:font-size-asian="11pt" style:font-style-asian="normal" style:font-weight-asian="normal"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588cm" style:type="right" style:leader-style="dotted" style:leader-text="."/>
        </style:tab-stops>
      </style:paragraph-properties>
    </style:style>
    <style:style style:name="P11" style:family="paragraph" style:parent-style-name="Contents_20_2">
      <style:paragraph-properties>
        <style:tab-stops>
          <style:tab-stop style:position="17.089cm" style:type="right" style:leader-style="dotted" style:leader-text="."/>
        </style:tab-stops>
      </style:paragraph-properties>
    </style:style>
    <style:style style:name="P12" style:family="paragraph" style:parent-style-name="Heading_20_1" style:list-style-name="">
      <style:paragraph-properties fo:text-align="justify" style:justify-single-word="false"/>
    </style:style>
    <style:style style:name="P13" style:family="paragraph" style:parent-style-name="Heading_20_1">
      <style:paragraph-properties fo:text-align="justify" style:justify-single-word="false" fo:break-before="page"/>
    </style:style>
    <style:style style:name="P14" style:family="paragraph" style:parent-style-name="Text_20_body">
      <style:paragraph-properties fo:text-align="justify" style:justify-single-word="false"/>
    </style:style>
    <style:style style:name="P15" style:family="paragraph" style:parent-style-name="Heading_20_1">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Heading_20_2">
      <style:paragraph-properties fo:text-align="justify" style:justify-single-word="false"/>
    </style:style>
    <style:style style:name="P18" style:family="paragraph" style:parent-style-name="Table_20_Heading">
      <style:paragraph-properties fo:text-align="justify" style:justify-single-word="false"/>
      <style:text-properties fo:font-weight="bold"/>
    </style:style>
    <style:style style:name="P19" style:family="paragraph" style:parent-style-name="Table_20_Contents">
      <style:paragraph-properties fo:text-align="justify" style:justify-single-word="false"/>
      <style:text-properties fo:font-weight="bold"/>
    </style:style>
    <style:style style:name="P20" style:family="paragraph" style:parent-style-name="Table_20_Contents">
      <style:paragraph-properties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4">
      <style:paragraph-properties fo:text-align="justify" style:justify-single-word="false"/>
    </style:style>
    <style:style style:name="P24" style:family="paragraph" style:parent-style-name="Text_20_body" style:list-style-name="L5">
      <style:paragraph-properties fo:text-align="justify" style:justify-single-word="false"/>
    </style:style>
    <style:style style:name="P25" style:family="paragraph" style:parent-style-name="Text_20_body" style:list-style-name="L6">
      <style:paragraph-properties fo:text-align="justify" style:justify-single-word="false"/>
    </style:style>
    <style:style style:name="P26" style:family="paragraph" style:parent-style-name="Text_20_body" style:list-style-name="L7">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9">
      <style:paragraph-properties fo:text-align="justify" style:justify-single-word="false"/>
    </style:style>
    <style:style style:name="P29" style:family="paragraph" style:parent-style-name="Text_20_body" style:list-style-name="L10">
      <style:paragraph-properties fo:text-align="justify" style:justify-single-word="false"/>
    </style:style>
    <style:style style:name="P30" style:family="paragraph" style:parent-style-name="Text_20_body" style:list-style-name="L11">
      <style:paragraph-properties fo:text-align="justify" style:justify-single-word="false"/>
    </style:style>
    <style:style style:name="P31" style:family="paragraph" style:parent-style-name="Text_20_body" style:list-style-name="L12">
      <style:paragraph-properties fo:text-align="justify" style:justify-single-word="false"/>
    </style:style>
    <style:style style:name="P32" style:family="paragraph" style:parent-style-name="Text_20_body" style:list-style-name="L13">
      <style:paragraph-properties fo:text-align="justify" style:justify-single-word="false"/>
    </style:style>
    <style:style style:name="P33" style:family="paragraph" style:parent-style-name="Text_20_body" style:list-style-name="L14">
      <style:paragraph-properties fo:text-align="justify" style:justify-single-word="false"/>
    </style:style>
    <style:style style:name="P34" style:family="paragraph" style:parent-style-name="Text_20_body" style:list-style-name="L15">
      <style:paragraph-properties fo:text-align="justify" style:justify-single-word="false"/>
    </style:style>
    <style:style style:name="P35" style:family="paragraph" style:parent-style-name="Text_20_body" style:list-style-name="L16">
      <style:paragraph-properties fo:text-align="justify" style:justify-single-word="false"/>
    </style:style>
    <style:style style:name="P36" style:family="paragraph" style:parent-style-name="Text_20_body" style:list-style-name="L17">
      <style:paragraph-properties fo:text-align="justify" style:justify-single-word="false"/>
    </style:style>
    <style:style style:name="P37" style:family="paragraph" style:parent-style-name="Text_20_body" style:list-style-name="L18">
      <style:paragraph-properties fo:text-align="justify" style:justify-single-word="false"/>
    </style:style>
    <style:style style:name="P38" style:family="paragraph" style:parent-style-name="Text_20_body" style:list-style-name="L19">
      <style:paragraph-properties fo:text-align="justify" style:justify-single-word="false"/>
    </style:style>
    <style:style style:name="P39" style:family="paragraph" style:parent-style-name="Text_20_body">
      <style:paragraph-properties fo:text-align="justify" style:justify-single-word="false"/>
      <style:text-properties fo:font-weight="bold"/>
    </style:style>
    <style:style style:name="P40" style:family="paragraph" style:parent-style-name="Text_20_body" style:list-style-name="L20">
      <style:paragraph-properties fo:text-align="justify" style:justify-single-word="false"/>
    </style:style>
    <style:style style:name="T1" style:family="text">
      <style:text-properties fo:font-variant="normal" fo:text-transform="none" style:use-window-font-color="true" loext:opacity="0%" style:text-line-through-style="none" style:text-line-through-type="none" style:font-name="Arial" fo:font-size="16pt" fo:font-style="normal" style:text-underline-style="none" fo:font-weight="bold" style:text-blinking="false" fo:background-color="transparent" loext:char-shading-value="0" style:font-size-asian="16pt" style:font-style-asian="normal" style:font-weight-asian="bold"/>
    </style:style>
    <style:style style:name="T2" style:family="text">
      <style:text-properties fo:font-variant="normal" fo:text-transform="none" style:use-window-font-color="true" loext:opacity="0%" style:text-line-through-style="none" style:text-line-through-type="none" style:font-name="Arial" fo:font-size="15pt" fo:font-style="normal" style:text-underline-style="none" fo:font-weight="bold" style:text-blinking="false" fo:background-color="transparent" loext:char-shading-value="0" style:font-size-asian="15pt" style:font-style-asian="normal" style:font-weight-asian="bold"/>
    </style:style>
    <style:style style:name="T3" style:family="text">
      <style:text-properties style:use-window-font-color="true" loext:opacity="0%"/>
    </style:style>
    <style:style style:name="T4" style:family="text">
      <style:text-properties fo:font-variant="normal" fo:text-transform="none" style:use-window-font-color="true" loext:opacity="0%" style:text-line-through-style="none" style:text-line-through-type="none" style:text-underline-style="none" style:text-blinking="false" fo:background-color="transparent" loext:char-shading-value="0"/>
    </style:style>
    <style:style style:name="T5" style:family="text">
      <style:text-properties fo:font-variant="normal" fo:text-transform="none" style:use-window-font-color="true" loext:opacity="0%" style:text-line-through-style="none" style:text-line-through-type="none" style:font-name="Arial" fo:font-size="17pt" fo:font-style="normal" style:text-underline-style="none" fo:font-weight="bold" style:text-blinking="false" fo:background-color="transparent" loext:char-shading-value="0" style:font-size-asian="17pt" style:font-style-asian="normal" style:font-weight-asian="bold"/>
    </style:style>
    <style:style style:name="T6"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font-size-asian="11pt" style:font-style-asian="normal" style:font-weight-asian="normal"/>
    </style:style>
    <style:style style:name="T7" style:family="text">
      <style:text-properties fo:font-variant="normal" fo:text-transform="none" style:use-window-font-color="true" loext:opacity="0%"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style>
    <style:style style:name="T8" style:family="text">
      <style:text-properties fo:font-variant="normal" fo:text-transform="none" style:use-window-font-color="true" loext:opacity="0%" style:text-line-through-style="none" style:text-line-through-type="none" style:font-name="Arial" fo:font-size="11pt" fo:font-style="normal" style:text-underline-style="none" fo:font-weight="normal" style:text-blinking="false" fo:background-color="transparent" loext:char-shading-value="0" style:font-size-asian="11pt" style:font-style-asian="normal" style:font-weight-asian="normal"/>
    </style:style>
    <style:style style:name="T9" style:family="text">
      <style:text-properties fo:font-variant="normal" fo:text-transform="none" style:use-window-font-color="true" loext:opacity="0%"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weight-complex="bold"/>
    </style:style>
    <style:style style:name="T10" style:family="text">
      <style:text-properties fo:font-variant="normal" fo:text-transform="none" style:use-window-font-color="true" loext:opacity="0%" style:text-line-through-style="none" style:text-line-through-type="none" style:font-name="Arial" fo:font-size="11pt" fo:font-style="normal" style:text-underline-style="none" fo:font-weight="normal" style:text-blinking="false" fo:background-color="transparent" loext:char-shading-value="0" style:font-size-asian="11pt" style:font-style-asian="normal" style:font-weight-asian="normal" style:font-weight-complex="normal"/>
    </style:style>
    <style:style style:name="T11" style:family="text">
      <style:text-properties fo:font-weight="bold"/>
    </style:style>
    <style:style style:name="T12" style:family="text">
      <style:text-properties fo:font-style="italic"/>
    </style:style>
    <style:style style:name="T13" style:family="text">
      <style:text-properties style:font-name="Liberation Mono"/>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docs-internal-guid-3353af8b-7fff-1219-f3"/><text:span text:style-name="T1">UNIVERSIDAD AUTÓNOMA GABRIEL RENÉ MORENO</text:span></text:p>
      <text:p text:style-name="P1" loext:marker-style-name="T2"><text:span text:style-name="T2">FACULTAD DE INGENIERÍA EN CIENCIAS DE LA COMPUTACIÓN Y TELECOMUNICACIONES</text:span></text:p>
      <text:p text:style-name="P2" loext:marker-style-name="T3"/>
      <text:p text:style-name="P1" loext:marker-style-name="T4"><draw:frame draw:style-name="fr1" draw:name="Image1" text:anchor-type="as-char" svg:width="5.814cm" svg:height="7.518cm" draw:z-index="0"><draw:image xlink:href="Pictures/10000001000002AF0000037C6F673238.png" xlink:type="simple" xlink:show="embed" xlink:actuate="onLoad" draw:mime-type="image/png"/></draw:frame></text:p>
      <text:p text:style-name="P2" loext:marker-style-name="T3"/>
      <text:p text:style-name="P1" loext:marker-style-name="T5"><text:span text:style-name="T5">Segundo Parcial – Ingeniería de Software II</text:span></text:p>
      <text:p text:style-name="P2" loext:marker-style-name="T3"/>
      <text:p text:style-name="P3" loext:marker-style-name="T2"><text:span text:style-name="T2">S</text:span><text:span text:style-name="T2">i</text:span><text:span text:style-name="T2">s</text:span><text:span text:style-name="T2">t</text:span><text:span text:style-name="T2">e</text:span><text:span text:style-name="T2">m</text:span><text:span text:style-name="T2">a </text:span><text:span text:style-name="T2">d</text:span><text:span text:style-name="T2">e </text:span><text:span text:style-name="T2">A</text:span><text:span text:style-name="T2">c</text:span><text:span text:style-name="T2">t</text:span><text:span text:style-name="T2">i</text:span><text:span text:style-name="T2">v</text:span><text:span text:style-name="T2">o</text:span><text:span text:style-name="T2">s </text:span><text:span text:style-name="T2">F</text:span><text:span text:style-name="T2">i</text:span><text:span text:style-name="T2">j</text:span><text:span text:style-name="T2">o</text:span><text:span text:style-name="T2">s </text:span><text:span text:style-name="T2">b</text:span><text:span text:style-name="T2">a</text:span><text:span text:style-name="T2">s</text:span><text:span text:style-name="T2">a</text:span><text:span text:style-name="T2">d</text:span><text:span text:style-name="T2">o </text:span><text:span text:style-name="T2">e</text:span><text:span text:style-name="T2">n </text:span><text:span text:style-name="T2">M</text:span><text:span text:style-name="T2">i</text:span><text:span text:style-name="T2">c</text:span><text:span text:style-name="T2">r</text:span><text:span text:style-name="T2">o </text:span><text:span text:style-name="T2">S</text:span><text:span text:style-name="T2">e</text:span><text:span text:style-name="T2">r</text:span><text:span text:style-name="T2">v</text:span><text:span text:style-name="T2">i</text:span><text:span text:style-name="T2">c</text:span><text:span text:style-name="T2">i</text:span><text:span text:style-name="T2">o</text:span><text:span text:style-name="T2">s</text:span></text:p>
      <text:p text:style-name="P4" loext:marker-style-name="T3"><text:span text:style-name="T3"><text:line-break/></text:span></text:p>
      <text:p text:style-name="P5" loext:marker-style-name="T6"/>
      <text:p text:style-name="P6" loext:marker-style-name="T3"><text:span text:style-name="T7">Docente</text:span><text:span text:style-name="T8">: Ing. Rolando Martinez Canedo</text:span></text:p>
      <text:p text:style-name="P6" loext:marker-style-name="T9"><text:span text:style-name="T9">Integrantes:</text:span></text:p>
      <text:list text:style-name="WWNum4">
        <text:list-item>
          <text:p text:style-name="P7" loext:marker-style-name="T10"><text:span text:style-name="T10">Loaiza Lavarden Reymar – 216027438</text:span></text:p>
        </text:list-item>
        <text:list-item>
          <text:p text:style-name="P7" loext:marker-style-name="T10"><text:span text:style-name="T10">Peña del Rio Alexander – 212179403</text:span></text:p>
        </text:list-item>
        <text:list-item>
          <text:p text:style-name="P8" loext:marker-style-name="T10">Quiroga Flores Herland Borys – 200104373</text:p>
        </text:list-item>
      </text:list>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9">Sumario</text:p>
          </text:index-title>
          <text:p text:style-name="P10"><text:a xlink:type="simple" xlink:href="#__RefHeading___Toc1019_1290176508" office:name="1. Descripción General del Sistema" text:style-name="Index_20_Link" text:visited-style-name="Index_20_Link">1. Descripción General del Sistema<text:tab/>3</text:a></text:p>
          <text:p text:style-name="P10"><text:a xlink:type="simple" xlink:href="#__RefHeading___Toc1021_1290176508" office:name="2. Alcance del Sistema" text:style-name="Index_20_Link" text:visited-style-name="Index_20_Link">2. Alcance del Sistema<text:tab/>3</text:a></text:p>
          <text:p text:style-name="P11"><text:a xlink:type="simple" xlink:href="#__RefHeading___Toc1023_1290176508" office:name="2.1 Tecnologías a Utilizar" text:style-name="Index_20_Link" text:visited-style-name="Index_20_Link">2.1 Tecnologías a Utilizar<text:tab/>3</text:a></text:p>
          <text:p text:style-name="P10"><text:a xlink:type="simple" xlink:href="#__RefHeading___Toc1025_1290176508" office:name="3. Actores del Sistema" text:style-name="Index_20_Link" text:visited-style-name="Index_20_Link">3. Actores del Sistema<text:tab/>4</text:a></text:p>
          <text:p text:style-name="P11"><text:a xlink:type="simple" xlink:href="#__RefHeading___Toc1027_1290176508" office:name="3.1 Actores Primarios" text:style-name="Index_20_Link" text:visited-style-name="Index_20_Link">3.1 Actores Primarios<text:tab/>4</text:a></text:p>
          <text:p text:style-name="P10"><text:a xlink:type="simple" xlink:href="#__RefHeading___Toc1029_1290176508" office:name="4. Microservicios y Distribución Tecnológica" text:style-name="Index_20_Link" text:visited-style-name="Index_20_Link">4. Microservicios y Distribución Tecnológica<text:tab/>5</text:a></text:p>
          <text:p text:style-name="P11"><text:a xlink:type="simple" xlink:href="#__RefHeading___Toc1031_1290176508" office:name="4.1 MS1 — Gestión de Activos Fijos" text:style-name="Index_20_Link" text:visited-style-name="Index_20_Link">4.1 MS1 — Gestión de Activos Fijos<text:tab/>5</text:a></text:p>
          <text:p text:style-name="P11"><text:a xlink:type="simple" xlink:href="#__RefHeading___Toc1033_1290176508" office:name="4.2 MS2 — Gestión Documental e Inteligencia Artificial" text:style-name="Index_20_Link" text:visited-style-name="Index_20_Link">4.2 MS2 — Gestión Documental e Inteligencia Artificial<text:tab/>6</text:a></text:p>
          <text:p text:style-name="P11"><text:a xlink:type="simple" xlink:href="#__RefHeading___Toc1035_1290176508" office:name="4.3 MS3 — Automatización y Notificaciones" text:style-name="Index_20_Link" text:visited-style-name="Index_20_Link">4.3 MS3 — Automatización y Notificaciones<text:tab/>6</text:a></text:p>
          <text:p text:style-name="P11"><text:a xlink:type="simple" xlink:href="#__RefHeading___Toc1037_1290176508" office:name="4.4 Almacenamiento de Archivos" text:style-name="Index_20_Link" text:visited-style-name="Index_20_Link">4.4 Almacenamiento de Archivos<text:tab/>6</text:a></text:p>
          <text:p text:style-name="P11"><text:a xlink:type="simple" xlink:href="#__RefHeading___Toc1039_1290176508" office:name="4.5 Frontend Web" text:style-name="Index_20_Link" text:visited-style-name="Index_20_Link">4.5 Frontend Web<text:tab/>6</text:a></text:p>
          <text:p text:style-name="P11"><text:a xlink:type="simple" xlink:href="#__RefHeading___Toc1041_1290176508" office:name="4.6 Aplicación Móvil" text:style-name="Index_20_Link" text:visited-style-name="Index_20_Link">4.6 Aplicación Móvil<text:tab/>7</text:a></text:p>
          <text:p text:style-name="P11"><text:a xlink:type="simple" xlink:href="#__RefHeading___Toc1043_1290176508" office:name="4.7 Infraestructura y Despliegue" text:style-name="Index_20_Link" text:visited-style-name="Index_20_Link">4.7 Infraestructura y Despliegue<text:tab/>7</text:a></text:p>
          <text:p text:style-name="P10"><text:a xlink:type="simple" xlink:href="#__RefHeading___Toc1045_1290176508" office:name="5. Módulos del Sistema y Casos de Uso" text:style-name="Index_20_Link" text:visited-style-name="Index_20_Link">5. Módulos del Sistema y Casos de Uso<text:tab/>7</text:a></text:p>
          <text:p text:style-name="P11"><text:a xlink:type="simple" xlink:href="#__RefHeading___Toc1047_1290176508" office:name="MÓDULO 1 — Gestión de Activos" text:style-name="Index_20_Link" text:visited-style-name="Index_20_Link">MÓDULO 1 — Gestión de Activos<text:tab/>7</text:a></text:p>
          <text:p text:style-name="P11"><text:a xlink:type="simple" xlink:href="#__RefHeading___Toc1049_1290176508" office:name="MÓDULO 2 — Gestión de Asignaciones y Traslados" text:style-name="Index_20_Link" text:visited-style-name="Index_20_Link">MÓDULO 2 — Gestión de Asignaciones y Traslados<text:tab/>7</text:a></text:p>
          <text:p text:style-name="P11"><text:a xlink:type="simple" xlink:href="#__RefHeading___Toc1051_1290176508" office:name="MÓDULO 3 — Gestión de Depreciación y Bajas" text:style-name="Index_20_Link" text:visited-style-name="Index_20_Link">MÓDULO 3 — Gestión de Depreciación y Bajas<text:tab/>8</text:a></text:p>
          <text:p text:style-name="P11"><text:a xlink:type="simple" xlink:href="#__RefHeading___Toc1053_1290176508" office:name="MÓDULO 4 — Gestión Documental" text:style-name="Index_20_Link" text:visited-style-name="Index_20_Link">MÓDULO 4 — Gestión Documental<text:tab/>8</text:a></text:p>
          <text:p text:style-name="P11"><text:a xlink:type="simple" xlink:href="#__RefHeading___Toc1055_1290176508" office:name="MÓDULO 5 — Diagnóstico por IA (App Móvil — Exclusivo para Responsable de Área)" text:style-name="Index_20_Link" text:visited-style-name="Index_20_Link">MÓDULO 5 — Diagnóstico por IA (App Móvil — Exclusivo para Responsable de Área)<text:tab/>9</text:a></text:p>
          <text:p text:style-name="P11"><text:a xlink:type="simple" xlink:href="#__RefHeading___Toc1057_1290176508" office:name="MÓDULO 6 — Trabajo de Campo (App Móvil — Exclusivo para Responsable de Área)" text:style-name="Index_20_Link" text:visited-style-name="Index_20_Link">MÓDULO 6 — Trabajo de Campo (App Móvil — Exclusivo para Responsable de Área)<text:tab/>9</text:a></text:p>
          <text:p text:style-name="P11"><text:a xlink:type="simple" xlink:href="#__RefHeading___Toc1059_1290176508" office:name="MÓDULO 7 — Gestión de Usuarios y Roles" text:style-name="Index_20_Link" text:visited-style-name="Index_20_Link">MÓDULO 7 — Gestión de Usuarios y Roles<text:tab/>10</text:a></text:p>
          <text:p text:style-name="P11"><text:a xlink:type="simple" xlink:href="#__RefHeading___Toc1061_1290176508" office:name="MÓDULO 8 — Inteligencia de Negocio" text:style-name="Index_20_Link" text:visited-style-name="Index_20_Link">MÓDULO 8 — Inteligencia de Negocio<text:tab/>10</text:a></text:p>
          <text:p text:style-name="P11"><text:a xlink:type="simple" xlink:href="#__RefHeading___Toc1063_1290176508" office:name="MÓDULO 9 — Análisis Predictivo (Machine Learning)" text:style-name="Index_20_Link" text:visited-style-name="Index_20_Link">MÓDULO 9 — Análisis Predictivo (Machine Learning)<text:tab/>11</text:a></text:p>
          <text:p text:style-name="P11"><text:a xlink:type="simple" xlink:href="#__RefHeading___Toc1065_1290176508" office:name="MÓDULO 10 — Automatización de Procesos" text:style-name="Index_20_Link" text:visited-style-name="Index_20_Link">MÓDULO 10 — Automatización de Procesos<text:tab/>11</text:a></text:p>
          <text:p text:style-name="P11"><text:a xlink:type="simple" xlink:href="#__RefHeading___Toc1067_1290176508" office:name="MÓDULO 11 — Registro Blockchain y Auditoría" text:style-name="Index_20_Link" text:visited-style-name="Index_20_Link">MÓDULO 11 — Registro Blockchain y Auditoría<text:tab/>11</text:a></text:p>
          <text:p text:style-name="P10"><text:a xlink:type="simple" xlink:href="#__RefHeading___Toc1069_1290176508" office:name="6. Relación de Casos de Uso con Tecnologías Avanzadas" text:style-name="Index_20_Link" text:visited-style-name="Index_20_Link">6. Relación de Casos de Uso con Tecnologías Avanzadas<text:tab/>12</text:a></text:p>
          <text:p text:style-name="P11"><text:a xlink:type="simple" xlink:href="#__RefHeading___Toc1071_1290176508" office:name="6.1 Deep Learning" text:style-name="Index_20_Link" text:visited-style-name="Index_20_Link">6.1 Deep Learning<text:tab/>12</text:a></text:p>
          <text:p text:style-name="P11"><text:a xlink:type="simple" xlink:href="#__RefHeading___Toc1073_1290176508" office:name="6.2 Machine Learning" text:style-name="Index_20_Link" text:visited-style-name="Index_20_Link">6.2 Machine Learning<text:tab/>12</text:a></text:p>
          <text:p text:style-name="P11"><text:a xlink:type="simple" xlink:href="#__RefHeading___Toc1075_1290176508" office:name="6.3 Blockchain" text:style-name="Index_20_Link" text:visited-style-name="Index_20_Link">6.3 Blockchain<text:tab/>13</text:a></text:p>
          <text:p text:style-name="P11"><text:a xlink:type="simple" xlink:href="#__RefHeading___Toc1077_1290176508" office:name="6.4 Automatización de Procesos — Flujo N8N" text:style-name="Index_20_Link" text:visited-style-name="Index_20_Link">6.4 Automatización de Procesos — Flujo N8N<text:tab/>13</text:a></text:p>
          <text:p text:style-name="P11"><text:a xlink:type="simple" xlink:href="#__RefHeading___Toc1079_1290176508" office:name="6.5 Inteligencia de Negocio" text:style-name="Index_20_Link" text:visited-style-name="Index_20_Link">6.5 Inteligencia de Negocio<text:tab/>13</text:a></text:p>
          <text:p text:style-name="P11"><text:a xlink:type="simple" xlink:href="#__RefHeading___Toc1081_1290176508" office:name="6.6 Aplicación Móvil — Recursos Nativos del Dispositivo" text:style-name="Index_20_Link" text:visited-style-name="Index_20_Link">6.6 Aplicación Móvil — Recursos Nativos del Dispositivo<text:tab/>14</text:a></text:p>
          <text:p text:style-name="P11"><text:a xlink:type="simple" xlink:href="#__RefHeading___Toc1083_1290176508" office:name="6.7 Gestión Documental — Módulos con Auditoría" text:style-name="Index_20_Link" text:visited-style-name="Index_20_Link">6.7 Gestión Documental — Módulos con Auditoría<text:tab/>14</text:a></text:p>
        </text:index-body>
      </text:table-of-content>
      <text:h text:style-name="P12" text:outline-level="1"/>
      <text:h text:style-name="P13" text:outline-level="1"><text:bookmark-start text:name="__RefHeading___Toc1019_1290176508"/>1. Descripción General del Sistema<text:bookmark-end text:name="__RefHeading___Toc1019_1290176508"/></text:h>
      <text:p text:style-name="P14">El sistema a desarrollar es una <text:span text:style-name="T11">plataforma distribuida de gestión integral de activos fijos</text:span> para una organización. Cubre las áreas operativas, administrativas y de inteligencia de negocio relacionadas con el ciclo de vida completo de los activos: registro, asignación, traslado, depreciación, mantenimiento y baja. Incorpora capacidades avanzadas de <text:span text:style-name="T11">Inteligencia Artificial, Machine Learning, Deep Learning, Blockchain y Automatización de Procesos</text:span>.</text:p>
      <text:p text:style-name="P14">El sistema se distribuye en <text:span text:style-name="T11">3 microservicios</text:span> desplegados en proveedores de nube distintos (Azure, AWS, Google Cloud), con un frontend web único en Angular y una aplicación móvil en React Native orientada al trabajo de campo del responsable de área.</text:p>
      <text:h text:style-name="P15" text:outline-level="1"><text:bookmark-start text:name="__RefHeading___Toc1021_1290176508"/>2. Alcance del Sistema<text:bookmark-end text:name="__RefHeading___Toc1021_1290176508"/></text:h>
      <text:p text:style-name="P14">El sistema abarca las siguientes áreas funcionales y tecnológicas:</text:p>
      <text:list text:style-name="L1">
        <text:list-item>
          <text:p text:style-name="P16">Registro y catalogación de activos fijos con ciclo de vida completo (adquisición → baja)</text:p>
        </text:list-item>
        <text:list-item>
          <text:p text:style-name="P16">Asignación de activos a responsables y áreas, con control de traslados</text:p>
        </text:list-item>
        <text:list-item>
          <text:p text:style-name="P16">Cálculo automático de depreciación por métodos lineal, acelerado y suma de dígitos</text:p>
        </text:list-item>
        <text:list-item>
          <text:p text:style-name="P16">Gestión documental con historial de versiones, auditoría completa y almacenamiento en S3</text:p>
        </text:list-item>
        <text:list-item>
          <text:p text:style-name="P16">Diagnóstico del estado físico de activos mediante Deep Learning aplicado a imágenes</text:p>
        </text:list-item>
        <text:list-item>
          <text:p text:style-name="P16">Análisis predictivo con Machine Learning supervisado (Random Forest) y no supervisado (K-Means)</text:p>
        </text:list-item>
        <text:list-item>
          <text:p text:style-name="P16">Registro inmutable de transacciones de activos mediante Blockchain</text:p>
        </text:list-item>
        <text:list-item>
          <text:p text:style-name="P16">Automatización de flujos con N8N: WhatsApp → sistema → notificación por email</text:p>
        </text:list-item>
        <text:list-item>
          <text:p text:style-name="P16">Business Intelligence con dashboards ejecutivos, KPIs y reportes de depreciación</text:p>
        </text:list-item>
        <text:list-item>
          <text:p text:style-name="P16">Aplicación móvil para inspección de campo con cámara, GPS y modo offline</text:p>
        </text:list-item>
        <text:list-item>
          <text:p text:style-name="P16">Despliegue 100% en la nube con contenedores Docker</text:p>
        </text:list-item>
      </text:list>
      <text:h text:style-name="P17" text:outline-level="2"><text:bookmark-start text:name="__RefHeading___Toc1023_1290176508"/>2.1 Tecnologías a Utilizar<text:bookmark-end text:name="__RefHeading___Toc1023_1290176508"/></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8">Capa</text:p>
            </table:table-cell>
            <table:table-cell table:style-name="Tabla1.A1" office:value-type="string">
              <text:p text:style-name="P18">Tecnología</text:p>
            </table:table-cell>
            <table:table-cell table:style-name="Tabla1.C1" office:value-type="string">
              <text:p text:style-name="P18">Rol en el sistema</text:p>
            </table:table-cell>
          </table:table-row>
        </table:table-header-rows>
        <table:table-row>
          <table:table-cell table:style-name="Tabla1.A2" office:value-type="string">
            <text:p text:style-name="P19">Backend MS1</text:p>
          </table:table-cell>
          <table:table-cell table:style-name="Tabla1.A2" office:value-type="string">
            <text:p text:style-name="P20">Spring Boot (Java)</text:p>
          </table:table-cell>
          <table:table-cell table:style-name="Tabla1.C2" office:value-type="string">
            <text:p text:style-name="P20">Gestión de Activos Fijos — Microsoft Azure</text:p>
          </table:table-cell>
        </table:table-row>
        <table:table-row>
          <table:table-cell table:style-name="Tabla1.A2" office:value-type="string">
            <text:p text:style-name="P19">Backend MS2</text:p>
          </table:table-cell>
          <table:table-cell table:style-name="Tabla1.A2" office:value-type="string">
            <text:p text:style-name="P20">FastAPI (Python)</text:p>
          </table:table-cell>
          <table:table-cell table:style-name="Tabla1.C2" office:value-type="string">
            <text:p text:style-name="P20">Gestión Documental e IA — Amazon AWS</text:p>
          </table:table-cell>
        </table:table-row>
        <table:table-row>
          <table:table-cell table:style-name="Tabla1.A2" office:value-type="string">
            <text:p text:style-name="P19">Backend MS3</text:p>
          </table:table-cell>
          <table:table-cell table:style-name="Tabla1.A2" office:value-type="string">
            <text:p text:style-name="P20">NestJS (Node.js)</text:p>
          </table:table-cell>
          <table:table-cell table:style-name="Tabla1.C2" office:value-type="string">
            <text:p text:style-name="P20">Automatización y Notificaciones — Google Cloud</text:p>
          </table:table-cell>
        </table:table-row>
        <text:soft-page-break/>
        <table:table-row>
          <table:table-cell table:style-name="Tabla1.A2" office:value-type="string">
            <text:p text:style-name="P19">Frontend Web</text:p>
          </table:table-cell>
          <table:table-cell table:style-name="Tabla1.A2" office:value-type="string">
            <text:p text:style-name="P20">Angular</text:p>
          </table:table-cell>
          <table:table-cell table:style-name="Tabla1.C2" office:value-type="string">
            <text:p text:style-name="P20">Interfaz única para todos los actores internos</text:p>
          </table:table-cell>
        </table:table-row>
        <table:table-row>
          <table:table-cell table:style-name="Tabla1.A2" office:value-type="string">
            <text:p text:style-name="P19">App Móvil</text:p>
          </table:table-cell>
          <table:table-cell table:style-name="Tabla1.A2" office:value-type="string">
            <text:p text:style-name="P20">React Native</text:p>
          </table:table-cell>
          <table:table-cell table:style-name="Tabla1.C2" office:value-type="string">
            <text:p text:style-name="P20">Trabajo de campo para el Responsable de Área (iOS y Android)</text:p>
          </table:table-cell>
        </table:table-row>
        <table:table-row>
          <table:table-cell table:style-name="Tabla1.A2" office:value-type="string">
            <text:p text:style-name="P19">Base de Datos Relacional</text:p>
          </table:table-cell>
          <table:table-cell table:style-name="Tabla1.A2" office:value-type="string">
            <text:p text:style-name="P20">PostgreSQL</text:p>
          </table:table-cell>
          <table:table-cell table:style-name="Tabla1.C2" office:value-type="string">
            <text:p text:style-name="P20">MS1 — activos, asignaciones, depreciación</text:p>
          </table:table-cell>
        </table:table-row>
        <table:table-row>
          <table:table-cell table:style-name="Tabla1.A2" office:value-type="string">
            <text:p text:style-name="P19">Base de Datos NoSQL</text:p>
          </table:table-cell>
          <table:table-cell table:style-name="Tabla1.A2" office:value-type="string">
            <text:p text:style-name="P20">DynamoDB (Amazon)</text:p>
          </table:table-cell>
          <table:table-cell table:style-name="Tabla1.C2" office:value-type="string">
            <text:p text:style-name="P20">MS2 — metadatos de documentos y auditoría</text:p>
          </table:table-cell>
        </table:table-row>
        <table:table-row>
          <table:table-cell table:style-name="Tabla1.A2" office:value-type="string">
            <text:p text:style-name="P19">Almacenamiento de Archivos</text:p>
          </table:table-cell>
          <table:table-cell table:style-name="Tabla1.A2" office:value-type="string">
            <text:p text:style-name="P20">Amazon S3</text:p>
          </table:table-cell>
          <table:table-cell table:style-name="Tabla1.C2" office:value-type="string">
            <text:p text:style-name="P20">Documentos PDF, imágenes, contratos, facturas</text:p>
          </table:table-cell>
        </table:table-row>
        <table:table-row>
          <table:table-cell table:style-name="Tabla1.A2" office:value-type="string">
            <text:p text:style-name="P19">Deep Learning</text:p>
          </table:table-cell>
          <table:table-cell table:style-name="Tabla1.A2" office:value-type="string">
            <text:p text:style-name="P20">TensorFlow / CNN</text:p>
          </table:table-cell>
          <table:table-cell table:style-name="Tabla1.C2" office:value-type="string">
            <text:p text:style-name="P20">Diagnóstico de estado físico de activos por imagen</text:p>
          </table:table-cell>
        </table:table-row>
        <table:table-row>
          <table:table-cell table:style-name="Tabla1.A2" office:value-type="string">
            <text:p text:style-name="P19">Machine Learning</text:p>
          </table:table-cell>
          <table:table-cell table:style-name="Tabla1.A2" office:value-type="string">
            <text:p text:style-name="P20">scikit-learn (Python)</text:p>
          </table:table-cell>
          <table:table-cell table:style-name="Tabla1.C2" office:value-type="string">
            <text:p text:style-name="P20">Predicción de vida útil y clustering de activos</text:p>
          </table:table-cell>
        </table:table-row>
        <table:table-row>
          <table:table-cell table:style-name="Tabla1.A2" office:value-type="string">
            <text:p text:style-name="P19">Blockchain</text:p>
          </table:table-cell>
          <table:table-cell table:style-name="Tabla1.A2" office:value-type="string">
            <text:p text:style-name="P20">Ethereum Sepolia / Web3j</text:p>
          </table:table-cell>
          <table:table-cell table:style-name="Tabla1.C2" office:value-type="string">
            <text:p text:style-name="P20">Registro inmutable de transacciones de activos</text:p>
          </table:table-cell>
        </table:table-row>
        <table:table-row>
          <table:table-cell table:style-name="Tabla1.A2" office:value-type="string">
            <text:p text:style-name="P19">Inteligencia de Negocio</text:p>
          </table:table-cell>
          <table:table-cell table:style-name="Tabla1.A2" office:value-type="string">
            <text:p text:style-name="P20">GraphQL + Chart.js / D3</text:p>
          </table:table-cell>
          <table:table-cell table:style-name="Tabla1.C2" office:value-type="string">
            <text:p text:style-name="P20">Dashboards ejecutivos con KPIs en el frontend Angular</text:p>
          </table:table-cell>
        </table:table-row>
        <table:table-row>
          <table:table-cell table:style-name="Tabla1.A2" office:value-type="string">
            <text:p text:style-name="P19">Automatización</text:p>
          </table:table-cell>
          <table:table-cell table:style-name="Tabla1.A2" office:value-type="string">
            <text:p text:style-name="P20">N8N + WhatsApp Business API + SendGrid</text:p>
          </table:table-cell>
          <table:table-cell table:style-name="Tabla1.C2" office:value-type="string">
            <text:p text:style-name="P20">Flujo automatizado de solicitudes y alertas</text:p>
          </table:table-cell>
        </table:table-row>
        <table:table-row>
          <table:table-cell table:style-name="Tabla1.A2" office:value-type="string">
            <text:p text:style-name="P19">API Gateway</text:p>
          </table:table-cell>
          <table:table-cell table:style-name="Tabla1.A2" office:value-type="string">
            <text:p text:style-name="P20">GraphQL (MS1) / REST (MS2 y MS3)</text:p>
          </table:table-cell>
          <table:table-cell table:style-name="Tabla1.C2" office:value-type="string">
            <text:p text:style-name="P20">Comunicación entre frontend, móvil y backends</text:p>
          </table:table-cell>
        </table:table-row>
        <table:table-row>
          <table:table-cell table:style-name="Tabla1.A2" office:value-type="string">
            <text:p text:style-name="P19">Infraestructura</text:p>
          </table:table-cell>
          <table:table-cell table:style-name="Tabla1.A2" office:value-type="string">
            <text:p text:style-name="P20">Docker</text:p>
          </table:table-cell>
          <table:table-cell table:style-name="Tabla1.C2" office:value-type="string">
            <text:p text:style-name="P20">Contenedores en 3 proveedores cloud</text:p>
          </table:table-cell>
        </table:table-row>
      </table:table>
      <text:p text:style-name="P14"/>
      <text:h text:style-name="P15" text:outline-level="1"><text:bookmark-start text:name="__RefHeading___Toc1025_1290176508"/>3. Actores del Sistema<text:bookmark-end text:name="__RefHeading___Toc1025_1290176508"/></text:h>
      <text:h text:style-name="P17" text:outline-level="2"><text:bookmark-start text:name="__RefHeading___Toc1027_1290176508"/>3.1 Actores Primarios<text:bookmark-end text:name="__RefHeading___Toc1027_1290176508"/></text:h>
      <table:table table:name="Tabla2" table:style-name="Tabla2">
        <table:table-column table:style-name="Tabla2.A"/>
        <table:table-column table:style-name="Tabla2.B"/>
        <table:table-header-rows>
          <table:table-row>
            <table:table-cell table:style-name="Tabla2.A1" office:value-type="string">
              <text:p text:style-name="P18">Actor</text:p>
            </table:table-cell>
            <table:table-cell table:style-name="Tabla2.B1" office:value-type="string">
              <text:p text:style-name="P18">Descripción</text:p>
            </table:table-cell>
          </table:table-row>
        </table:table-header-rows>
        <table:table-row>
          <table:table-cell table:style-name="Tabla2.A2" office:value-type="string">
            <text:p text:style-name="P19">Administrador</text:p>
          </table:table-cell>
          <table:table-cell table:style-name="Tabla2.B2" office:value-type="string">
            <text:p text:style-name="P20">Responsable de la gestión integral de activos. Registra, asigna, traslada, deprecia y da de baja activos. Accede a dashboards de BI, reportes de depreciación y configuración del sistema. Interactúa principalmente desde el frontend web Angular.</text:p>
          </table:table-cell>
        </table:table-row>
        <table:table-row>
          <table:table-cell table:style-name="Tabla2.A2" office:value-type="string">
            <text:p text:style-name="P19">Responsable de Área</text:p>
          </table:table-cell>
          <table:table-cell table:style-name="Tabla2.B2" office:value-type="string">
            <text:p text:style-name="P20">Personal a cargo de los activos asignados a su área. Realiza inspecciones de campo: fotografía activos, geolocaliza su posición y reporta problemas. Trabaja desde la aplicación móvil React Native con capacidad offline.</text:p>
          </table:table-cell>
        </table:table-row>
        <text:soft-page-break/>
        <table:table-row>
          <table:table-cell table:style-name="Tabla2.A2" office:value-type="string">
            <text:p text:style-name="P19">Auditor</text:p>
          </table:table-cell>
          <table:table-cell table:style-name="Tabla2.B2" office:value-type="string">
            <text:p text:style-name="P20">Rol de sólo lectura. Revisa el historial de movimientos, documentos asociados, logs de auditoría y registros Blockchain para verificar la trazabilidad completa de los activos. Accede desde el frontend web Angular.</text:p>
          </table:table-cell>
        </table:table-row>
        <table:table-row>
          <table:table-cell table:style-name="Tabla2.A2" office:value-type="string">
            <text:p text:style-name="P19">Solo Lectura</text:p>
          </table:table-cell>
          <table:table-cell table:style-name="Tabla2.B2" office:value-type="string">
            <text:p text:style-name="P20">Usuario con acceso de consulta. Puede visualizar el catálogo de activos y sus asignaciones, sin capacidad de modificación.</text:p>
          </table:table-cell>
        </table:table-row>
      </table:table>
      <text:h text:style-name="P15" text:outline-level="1"><text:bookmark-start text:name="__RefHeading___Toc1029_1290176508"/>4. Microservicios y Distribución Tecnológica<text:bookmark-end text:name="__RefHeading___Toc1029_1290176508"/></text:h>
      <text:p text:style-name="P14"><draw:frame draw:style-name="fr2" draw:name="Imagen1" text:anchor-type="char" svg:width="17.59cm" svg:height="13.765cm" draw:z-index="1"><draw:image xlink:href="Pictures/100000010000060A000004BA9217221A.png" xlink:type="simple" xlink:show="embed" xlink:actuate="onLoad" draw:mime-type="image/png"/></draw:frame></text:p>
      <text:h text:style-name="P17" text:outline-level="2"><text:bookmark-start text:name="__RefHeading___Toc1031_1290176508"/>4.1 M1 — Gestión de Activos Fijos<text:bookmark-end text:name="__RefHeading___Toc1031_1290176508"/></text:h>
      <text:list text:style-name="L2">
        <text:list-item>
          <text:p text:style-name="P21"><text:span text:style-name="T11">Framework Backend:</text:span> Spring Boot (Java)</text:p>
        </text:list-item>
        <text:list-item>
          <text:p text:style-name="P21"><text:span text:style-name="T11">Base de Datos:</text:span> PostgreSQL (relacional)</text:p>
        </text:list-item>
        <text:list-item>
          <text:p text:style-name="P21"><text:span text:style-name="T11">Proveedor Cloud:</text:span> Microsoft Azure (Azure App Service + Azure PostgreSQL Flexible Server)</text:p>
        </text:list-item>
        <text:list-item>
          <text:p text:style-name="P21"><text:span text:style-name="T11">Responsabilidades:</text:span> Registro y catalogación de activos fijos, asignación a responsables y áreas, <text:soft-page-break/>control de traslados, cálculo de depreciación (lineal, acelerado, suma de dígitos), gestión de bajas, registro Blockchain de cada transacción, endpoints de Business Intelligence para el dashboard Angular. Toda la comunicación con el frontend Angular se realiza mediante <text:span text:style-name="T11">GraphQL</text:span>.</text:p>
        </text:list-item>
      </text:list>
      <text:h text:style-name="P17" text:outline-level="2" text:is-list-header="true"><text:bookmark-start text:name="__RefHeading___Toc1033_1290176508"/>4.2 MS2 — Gestión Documental e Inteligencia Artificial<text:bookmark-end text:name="__RefHeading___Toc1033_1290176508"/></text:h>
      <text:list text:style-name="L3">
        <text:list-item>
          <text:p text:style-name="P22"><text:span text:style-name="T11">Framework Backend:</text:span> FastAPI (Python)</text:p>
        </text:list-item>
        <text:list-item>
          <text:p text:style-name="P22"><text:span text:style-name="T11">Base de Datos:</text:span> DynamoDB (NoSQL) + Amazon S3</text:p>
        </text:list-item>
        <text:list-item>
          <text:p text:style-name="P22"><text:span text:style-name="T11">Proveedor Cloud:</text:span> Amazon Web Services (AWS Lambda / ECS)</text:p>
        </text:list-item>
        <text:list-item>
          <text:p text:style-name="P22"><text:span text:style-name="T11">Responsabilidades:</text:span> Subida y descarga de documentos (PDF, imágenes, contratos), historial de versiones, auditoría completa de accesos y modificaciones en DynamoDB, diagnóstico del estado físico de activos por imagen (CNN — Deep Learning), predicción de vida útil restante (Random Forest — ML Supervisado), agrupación de activos por comportamiento (K-Means — ML No Supervisado).</text:p>
        </text:list-item>
      </text:list>
      <text:h text:style-name="P17" text:outline-level="2" text:is-list-header="true"><text:bookmark-start text:name="__RefHeading___Toc1035_1290176508"/>4.3 MS3 — Automatización y Notificaciones<text:bookmark-end text:name="__RefHeading___Toc1035_1290176508"/></text:h>
      <text:list text:style-name="L4">
        <text:list-item>
          <text:p text:style-name="P23"><text:span text:style-name="T11">Framework Backend:</text:span> NestJS (Node.js)</text:p>
        </text:list-item>
        <text:list-item>
          <text:p text:style-name="P23"><text:span text:style-name="T11">Herramienta de Automatización:</text:span> N8N</text:p>
        </text:list-item>
        <text:list-item>
          <text:p text:style-name="P23"><text:span text:style-name="T11">Proveedor Cloud:</text:span> Google Cloud Platform (Cloud Run)</text:p>
        </text:list-item>
        <text:list-item>
          <text:p text:style-name="P23"><text:span text:style-name="T11">Responsabilidades:</text:span> Orquestación de flujos automatizados con N8N, recepción de solicitudes vía WhatsApp Business API, generación automática de órdenes de revisión y mantenimiento, envío de notificaciones por correo electrónico (SendGrid), alertas por vencimiento de garantías o mantenimientos programados.</text:p>
        </text:list-item>
      </text:list>
      <text:h text:style-name="P17" text:outline-level="2" text:is-list-header="true"><text:bookmark-start text:name="__RefHeading___Toc1037_1290176508"/>4.4 Almacenamiento de Archivos<text:bookmark-end text:name="__RefHeading___Toc1037_1290176508"/></text:h>
      <text:list text:style-name="L5">
        <text:list-item>
          <text:p text:style-name="P24"><text:span text:style-name="T11">Servicio:</text:span> Amazon S3</text:p>
        </text:list-item>
        <text:list-item>
          <text:p text:style-name="P24"><text:span text:style-name="T11">Uso:</text:span> Documentos PDF de compra y garantía, fotografías de estado inicial y diagnóstico, informes de mantenimiento, actas de baja, contratos y reportes exportados.</text:p>
        </text:list-item>
      </text:list>
      <text:h text:style-name="P17" text:outline-level="2" text:is-list-header="true"><text:bookmark-start text:name="__RefHeading___Toc1039_1290176508"/>4.5 Frontend Web<text:bookmark-end text:name="__RefHeading___Toc1039_1290176508"/></text:h>
      <text:list text:style-name="L6">
        <text:list-item>
          <text:p text:style-name="P25"><text:span text:style-name="T11">Framework:</text:span> Angular</text:p>
        </text:list-item>
        <text:list-item>
          <text:p text:style-name="P25"><text:span text:style-name="T11">Interacción con backends:</text:span> GraphQL hacia MS1 (gestión de activos y BI); REST hacia MS2 (documentos, IA) y MS3 (flujos, notificaciones).</text:p>
        </text:list-item>
      </text:list>
      <text:h text:style-name="P17" text:outline-level="2" text:is-list-header="true"><text:bookmark-start text:name="__RefHeading___Toc1041_1290176508"/>4.6 Aplicación Móvil<text:bookmark-end text:name="__RefHeading___Toc1041_1290176508"/></text:h>
      <text:list text:style-name="L7">
        <text:list-item>
          <text:p text:style-name="P26"><text:span text:style-name="T11">Framework:</text:span> React Native</text:p>
        </text:list-item>
        <text:list-item>
          <text:p text:style-name="P26"><text:soft-page-break/><text:span text:style-name="T11">Público objetivo:</text:span> Responsable de Área (personal de campo)</text:p>
        </text:list-item>
        <text:list-item>
          <text:p text:style-name="P26"><text:span text:style-name="T11">Funcionalidades Clave:</text:span> Consulta de activos asignados al área, fotografía de activos con diagnóstico IA en tiempo real, geolocalización de activos mediante GPS, reporte de problemas o solicitud de revisión, trabajo offline con caché local de activos, recepción de notificaciones push.</text:p>
        </text:list-item>
      </text:list>
      <text:h text:style-name="P17" text:outline-level="2" text:is-list-header="true"><text:bookmark-start text:name="__RefHeading___Toc1043_1290176508"/>4.7 Infraestructura y Despliegue<text:bookmark-end text:name="__RefHeading___Toc1043_1290176508"/></text:h>
      <text:list text:style-name="L8">
        <text:list-item>
          <text:p text:style-name="P27"><text:span text:style-name="T11">Contenedores:</text:span> Docker (todos los servicios)</text:p>
        </text:list-item>
        <text:list-item>
          <text:p text:style-name="P27"><text:span text:style-name="T11">Proveedores:</text:span> Microsoft Azure (MS1) — Amazon Web Services (MS2) — Google Cloud Platform (MS3)</text:p>
        </text:list-item>
      </text:list>
      <text:h text:style-name="P15" text:outline-level="1"><text:bookmark-start text:name="__RefHeading___Toc1045_1290176508"/>5. Módulos del Sistema y Casos de Uso<text:bookmark-end text:name="__RefHeading___Toc1045_1290176508"/></text:h>
      <text:h text:style-name="P17" text:outline-level="2"><text:bookmark-start text:name="__RefHeading___Toc1047_1290176508"/>MÓDULO 1 — Gestión de Activos<text:bookmark-end text:name="__RefHeading___Toc1047_1290176508"/></text:h>
      <text:p text:style-name="P14"><text:span text:style-name="T11">Objetivo:</text:span> Administrar el ciclo de vida completo de los activos fijos de la organización, desde su adquisición hasta la baja definitiva. Es el núcleo operativo del sistema; todas las demás entidades del sistema se relacionan con el activo.</text:p>
      <text:p text:style-name="P14"><text:span text:style-name="T11">Funciones principales:</text:span> <text:span text:style-name="T12">Registrar activo, editar datos, consultar catálogo, buscar por criterios, cambiar estado, generar código de activo, clasificar por categoría.</text:span></text:p>
      <text:list text:style-name="L9">
        <text:list-item>
          <text:p text:style-name="P28">CU-01: Registrar nuevo activo fijo</text:p>
        </text:list-item>
        <text:list-item>
          <text:p text:style-name="P28">CU-02: Editar datos del activo</text:p>
        </text:list-item>
        <text:list-item>
          <text:p text:style-name="P28">CU-03: Consultar catálogo de activos</text:p>
        </text:list-item>
        <text:list-item>
          <text:p text:style-name="P28">CU-04: Buscar activo por código, nombre o categoría</text:p>
        </text:list-item>
        <text:list-item>
          <text:p text:style-name="P28">CU-05: Cambiar estado del activo (ACTIVO / EN_MANTENIMIENTO / TRANSFERIDO / DADO_DE_BAJA)</text:p>
        </text:list-item>
        <text:list-item>
          <text:p text:style-name="P28">CU-06: Registrar categoría de activo con método de depreciación</text:p>
        </text:list-item>
        <text:list-item>
          <text:p text:style-name="P28">CU-07: Editar categoría de activo</text:p>
        </text:list-item>
        <text:list-item>
          <text:p text:style-name="P28">CU-08: Consultar historial completo de movimientos del activo</text:p>
        </text:list-item>
        <text:list-item>
          <text:p text:style-name="P28">CU-09: Ver ficha detallada del activo con valor en libros actual</text:p>
        </text:list-item>
      </text:list>
      <text:h text:style-name="P17" text:outline-level="2" text:is-list-header="true"><text:bookmark-start text:name="__RefHeading___Toc1049_1290176508"/>MÓDULO 2 — Gestión de Asignaciones y Traslados<text:bookmark-end text:name="__RefHeading___Toc1049_1290176508"/></text:h>
      <text:p text:style-name="P14"><text:span text:style-name="T11">Objetivo:</text:span> Controlar la asignación de activos a responsables y áreas, y gestionar los movimientos físicos entre áreas. Cada operación genera un registro Blockchain para garantizar trazabilidad e inalterabilidad.</text:p>
      <text:p text:style-name="P14"><text:soft-page-break/><text:span text:style-name="T11">Funciones principales:</text:span> <text:span text:style-name="T12">Asignar activo, registrar traslado, devolver activo, consultar activos por área, autorizar traslado.</text:span></text:p>
      <text:list text:style-name="L10">
        <text:list-item>
          <text:p text:style-name="P29">CU-10: Asignar activo a responsable de área</text:p>
        </text:list-item>
        <text:list-item>
          <text:p text:style-name="P29">CU-11: Devolver activo al inventario general</text:p>
        </text:list-item>
        <text:list-item>
          <text:p text:style-name="P29">CU-12: Registrar traslado de activo entre áreas</text:p>
        </text:list-item>
        <text:list-item>
          <text:p text:style-name="P29">CU-13: Autorizar traslado (requiere rol Administrador)</text:p>
        </text:list-item>
        <text:list-item>
          <text:p text:style-name="P29">CU-14: Consultar activos asignados por área</text:p>
        </text:list-item>
        <text:list-item>
          <text:p text:style-name="P29">CU-15: Consultar historial de asignaciones de un activo</text:p>
        </text:list-item>
        <text:list-item>
          <text:p text:style-name="P29">CU-16: Consultar historial de traslados de un activo</text:p>
        </text:list-item>
        <text:list-item>
          <text:p text:style-name="P29">CU-17: Generar reporte de activos por responsable</text:p>
        </text:list-item>
      </text:list>
      <text:h text:style-name="P17" text:outline-level="2" text:is-list-header="true"><text:bookmark-start text:name="__RefHeading___Toc1051_1290176508"/>MÓDULO 3 — Gestión de Depreciación y Bajas<text:bookmark-end text:name="__RefHeading___Toc1051_1290176508"/></text:h>
      <text:p text:style-name="P14"><text:span text:style-name="T11">Objetivo:</text:span> Calcular y registrar la depreciación de activos fijos según el método configurado en su categoría. Gestionar el retiro definitivo de activos con registro de valor residual y motivo de baja.</text:p>
      <text:p text:style-name="P14"><text:span text:style-name="T11">Funciones principales:</text:span> <text:span text:style-name="T12">Calcular depreciación, generar reporte anual, registrar baja de activo, consultar valor en libros, proyectar vida útil restante.</text:span></text:p>
      <text:list text:style-name="L11">
        <text:list-item>
          <text:p text:style-name="P30">CU-18: Calcular depreciación de activo (lineal / acelerado / suma de dígitos)</text:p>
        </text:list-item>
        <text:list-item>
          <text:p text:style-name="P30">CU-19: Generar reporte de depreciación anual por categoría</text:p>
        </text:list-item>
        <text:list-item>
          <text:p text:style-name="P30">CU-20: Consultar valor en libros actual de un activo</text:p>
        </text:list-item>
        <text:list-item>
          <text:p text:style-name="P30">CU-21: Proyectar vida útil restante de un activo</text:p>
        </text:list-item>
        <text:list-item>
          <text:p text:style-name="P30">CU-22: Registrar baja de activo (con motivo y valor residual)</text:p>
        </text:list-item>
        <text:list-item>
          <text:p text:style-name="P30">CU-23: Autorizar baja de activo (requiere rol Administrador)</text:p>
        </text:list-item>
        <text:list-item>
          <text:p text:style-name="P30">CU-24: Consultar historial de activos dados de baja en un período</text:p>
        </text:list-item>
        <text:list-item>
          <text:p text:style-name="P30">CU-25: Generar acta de baja en PDF</text:p>
        </text:list-item>
      </text:list>
      <text:h text:style-name="P17" text:outline-level="2" text:is-list-header="true"><text:bookmark-start text:name="__RefHeading___Toc1053_1290176508"/>MÓDULO 4 — Gestión Documental<text:bookmark-end text:name="__RefHeading___Toc1053_1290176508"/></text:h>
      <text:p text:style-name="P14"><text:span text:style-name="T11">Objetivo:</text:span> Centralizar el almacenamiento, acceso y versionamiento de todos los documentos asociados a cada activo fijo. Registra auditoría completa en DynamoDB de quién accedió, modificó o descargó cada documento.</text:p>
      <text:p text:style-name="P14"><text:span text:style-name="T11">Funciones principales:</text:span> <text:span text:style-name="T12">Cargar documento, descargar documento, gestionar versiones, visualizar historial de auditoría, eliminar documento.</text:span></text:p>
      <text:list text:style-name="L12">
        <text:list-item>
          <text:p text:style-name="P31">CU-26: Cargar documento asociado a un activo (PDF, imagen, contrato)</text:p>
        </text:list-item>
        <text:list-item>
          <text:p text:style-name="P31"><text:soft-page-break/>CU-27: Descargar documento desde Amazon S3</text:p>
        </text:list-item>
        <text:list-item>
          <text:p text:style-name="P31">CU-28: Actualizar versión de un documento existente</text:p>
        </text:list-item>
        <text:list-item>
          <text:p text:style-name="P31">CU-29: Consultar historial de versiones de un documento</text:p>
        </text:list-item>
        <text:list-item>
          <text:p text:style-name="P31">CU-30: Eliminar documento (con registro en auditoría)</text:p>
        </text:list-item>
        <text:list-item>
          <text:p text:style-name="P31">CU-31: Consultar log de auditoría de un documento (accesos, modificaciones)</text:p>
        </text:list-item>
        <text:list-item>
          <text:p text:style-name="P31">CU-32: Buscar documentos por tipo, activo o fecha</text:p>
        </text:list-item>
        <text:list-item>
          <text:p text:style-name="P31">CU-33: Listar todos los documentos de un activo</text:p>
        </text:list-item>
      </text:list>
      <text:h text:style-name="P17" text:outline-level="2" text:is-list-header="true"><text:bookmark-start text:name="__RefHeading___Toc1055_1290176508"/>MÓDULO 5 — Diagnóstico por IA (App Móvil — Exclusivo para Responsable de Área)<text:bookmark-end text:name="__RefHeading___Toc1055_1290176508"/></text:h>
      <text:p text:style-name="P14"><text:span text:style-name="T11">Objetivo:</text:span> Permitir al Responsable de Área fotografiar un activo en campo y recibir en tiempo real un diagnóstico automático del estado físico generado por el modelo de Deep Learning (CNN) del MS2. El diagnóstico es registrado en el historial del activo.</text:p>
      <text:p text:style-name="P14"><text:span text:style-name="T11">Funciones principales:</text:span> <text:span text:style-name="T12">Activar cámara, capturar fotografía, enviar al modelo CNN, recibir diagnóstico con nivel de confianza, guardar resultado en historial del activo.</text:span></text:p>
      <text:list text:style-name="L13">
        <text:list-item>
          <text:p text:style-name="P32">CU-34: Fotografiar activo con la cámara del dispositivo</text:p>
        </text:list-item>
        <text:list-item>
          <text:p text:style-name="P32">CU-35: Enviar imagen al MS2 para diagnóstico por CNN</text:p>
        </text:list-item>
        <text:list-item>
          <text:p text:style-name="P32">CU-36: Recibir diagnóstico: estado (Bueno / Deteriorado / Requiere mantenimiento), confianza y detalle</text:p>
        </text:list-item>
        <text:list-item>
          <text:p text:style-name="P32">CU-37: Guardar imagen y diagnóstico en el historial del activo</text:p>
        </text:list-item>
        <text:list-item>
          <text:p text:style-name="P32">CU-38: Consultar historial de diagnósticos anteriores del activo</text:p>
        </text:list-item>
        <text:list-item>
          <text:p text:style-name="P32">CU-39: Solicitar orden de mantenimiento desde el resultado del diagnóstico</text:p>
        </text:list-item>
      </text:list>
      <text:h text:style-name="P17" text:outline-level="2" text:is-list-header="true"><text:bookmark-start text:name="__RefHeading___Toc1057_1290176508"/>MÓDULO 6 — Trabajo de Campo (App Móvil — Exclusivo para Responsable de Área)<text:bookmark-end text:name="__RefHeading___Toc1057_1290176508"/></text:h>
      <text:p text:style-name="P14"><text:span text:style-name="T11">Objetivo:</text:span> Dar al Responsable de Área las herramientas necesarias para gestionar sus activos desde el terreno. Incluye geolocalización, trabajo sin conexión y recepción de alertas en tiempo real.</text:p>
      <text:p text:style-name="P14"><text:span text:style-name="T11">Funciones principales:</text:span> <text:span text:style-name="T12">Consultar activos asignados, geolocalizar activo, trabajar offline, reportar problema por WhatsApp, recibir notificaciones push.</text:span></text:p>
      <text:list text:style-name="L14">
        <text:list-item>
          <text:p text:style-name="P33">CU-40: Consultar activos asignados al área (con modo offline)</text:p>
        </text:list-item>
        <text:list-item>
          <text:p text:style-name="P33">CU-41: Ver detalle de activo en campo</text:p>
        </text:list-item>
        <text:list-item>
          <text:p text:style-name="P33">CU-42: Geolocalizar activo y registrar coordenadas GPS</text:p>
        </text:list-item>
        <text:list-item>
          <text:p text:style-name="P33">CU-43: Reportar problema o solicitar revisión (integrado con WhatsApp)</text:p>
        </text:list-item>
        <text:list-item>
          <text:p text:style-name="P33"><text:soft-page-break/>CU-44: Recibir notificación push de alertas de mantenimiento</text:p>
        </text:list-item>
        <text:list-item>
          <text:p text:style-name="P33">CU-45: Sincronizar datos offline al recuperar conexión</text:p>
        </text:list-item>
      </text:list>
      <text:h text:style-name="P17" text:outline-level="2" text:is-list-header="true"><text:bookmark-start text:name="__RefHeading___Toc1059_1290176508"/>MÓDULO 7 — Gestión de Usuarios y Roles<text:bookmark-end text:name="__RefHeading___Toc1059_1290176508"/></text:h>
      <text:p text:style-name="P14"><text:span text:style-name="T11">Objetivo:</text:span> Administrar el ciclo de vida de los usuarios del sistema: Administrador, Responsable de Área, Auditor y Solo Lectura. Garantiza el control de acceso y la integridad del sistema.</text:p>
      <text:p text:style-name="P14"><text:span text:style-name="T11">Funciones principales:</text:span> <text:span text:style-name="T12">Crear usuario, editar datos, asignar rol, inactivar usuario, restablecer contraseña, buscar por criterios.</text:span></text:p>
      <text:list text:style-name="L15">
        <text:list-item>
          <text:p text:style-name="P34">CU-46: Registrar nuevo usuario</text:p>
        </text:list-item>
        <text:list-item>
          <text:p text:style-name="P34">CU-47: Editar datos personales del usuario</text:p>
        </text:list-item>
        <text:list-item>
          <text:p text:style-name="P34">CU-48: Asignar o cambiar rol del usuario</text:p>
        </text:list-item>
        <text:list-item>
          <text:p text:style-name="P34">CU-49: Inactivar o dar de baja a un usuario</text:p>
        </text:list-item>
        <text:list-item>
          <text:p text:style-name="P34">CU-50: Restablecer contraseña</text:p>
        </text:list-item>
        <text:list-item>
          <text:p text:style-name="P34">CU-51: Registrar área organizacional</text:p>
        </text:list-item>
        <text:list-item>
          <text:p text:style-name="P34">CU-52: Asignar responsable principal a un área</text:p>
        </text:list-item>
        <text:list-item>
          <text:p text:style-name="P34">CU-53: Buscar usuario por nombre, email o rol</text:p>
        </text:list-item>
      </text:list>
      <text:h text:style-name="P17" text:outline-level="2" text:is-list-header="true"><text:bookmark-start text:name="__RefHeading___Toc1061_1290176508"/>MÓDULO 8 — Inteligencia de Negocio<text:bookmark-end text:name="__RefHeading___Toc1061_1290176508"/></text:h>
      <text:p text:style-name="P14"><text:span text:style-name="T11">Objetivo:</text:span> Proveer a administradores y auditores una visión clara del estado y desempeño del inventario de activos mediante dashboards interactivos con KPIs. Los datos se exponen a través del endpoint GraphQL <text:span text:style-name="T13">dashboardBI</text:span> del MS1 y se visualizan en el frontend Angular.</text:p>
      <text:p text:style-name="P14"><text:span text:style-name="T11">Funciones principales:</text:span> <text:span text:style-name="T12">Visualizar dashboard ejecutivo, consultar KPIs por período, analizar depreciación, exportar reporte, consultar proyección de vida útil.</text:span></text:p>
      <text:list text:style-name="L16">
        <text:list-item>
          <text:p text:style-name="P35">CU-54: Visualizar dashboard ejecutivo con KPIs</text:p>
        </text:list-item>
        <text:list-item>
          <text:p text:style-name="P35">CU-55: Consultar total de activos y valor total en libros</text:p>
        </text:list-item>
        <text:list-item>
          <text:p text:style-name="P35">CU-56: Analizar depreciación acumulada por categoría y área</text:p>
        </text:list-item>
        <text:list-item>
          <text:p text:style-name="P35">CU-57: Ver distribución de activos por estado</text:p>
        </text:list-item>
        <text:list-item>
          <text:p text:style-name="P35">CU-58: Consultar tendencia de adquisiciones por año</text:p>
        </text:list-item>
        <text:list-item>
          <text:p text:style-name="P35">CU-59: Ver proyección de vida útil de activos críticos</text:p>
        </text:list-item>
        <text:list-item>
          <text:p text:style-name="P35">CU-60: Exportar reporte de BI en PDF</text:p>
        </text:list-item>
      </text:list>
      <text:h text:style-name="P17" text:outline-level="2" text:is-list-header="true"><text:bookmark-start text:name="__RefHeading___Toc1063_1290176508"/>MÓDULO 9 — Análisis Predictivo (Machine Learning)<text:bookmark-end text:name="__RefHeading___Toc1063_1290176508"/></text:h>
      <text:p text:style-name="P14"><text:span text:style-name="T11">Objetivo:</text:span> Aplicar modelos de Machine Learning supervisado y no supervisado sobre los datos del <text:soft-page-break/>sistema para generar predicciones de vida útil y agrupar activos por patrones de comportamiento.</text:p>
      <text:p text:style-name="P14"><text:span text:style-name="T11">Funciones principales:</text:span> <text:span text:style-name="T12">Generar predicción de vida útil, clasificar riesgo de fallo, agrupar activos por clustering, consultar resultado de predicción.</text:span></text:p>
      <text:list text:style-name="L17">
        <text:list-item>
          <text:p text:style-name="P36">CU-61: Generar predicción de vida útil restante de un activo (Random Forest — regresión)</text:p>
        </text:list-item>
        <text:list-item>
          <text:p text:style-name="P36">CU-62: Estimar probabilidad de fallo próximo de un activo (Random Forest — clasificación)</text:p>
        </text:list-item>
        <text:list-item>
          <text:p text:style-name="P36">CU-63: Agrupar activos por patrones de comportamiento (K-Means — no supervisado)</text:p>
        </text:list-item>
        <text:list-item>
          <text:p text:style-name="P36">CU-64: Consultar resultado de predicción en la ficha del activo</text:p>
        </text:list-item>
        <text:list-item>
          <text:p text:style-name="P36">CU-65: Recibir recomendación de mantenimiento preventivo basada en predicción</text:p>
        </text:list-item>
        <text:list-item>
          <text:p text:style-name="P36">CU-66: Visualizar grupos de clustering con etiqueta de comportamiento (Alto riesgo / Normal / Eficiente)</text:p>
        </text:list-item>
      </text:list>
      <text:h text:style-name="P17" text:outline-level="2" text:is-list-header="true"><text:bookmark-start text:name="__RefHeading___Toc1065_1290176508"/>MÓDULO 10 — Automatización de Procesos<text:bookmark-end text:name="__RefHeading___Toc1065_1290176508"/></text:h>
      <text:p text:style-name="P14"><text:span text:style-name="T11">Objetivo:</text:span> Orquestar flujos automatizados de mínimo 3 pasos que conectan los microservicios del sistema con canales externos (WhatsApp, Email) sin intervención manual. El motor de automatización es N8N desplegado en MS3.</text:p>
      <text:p text:style-name="P14"><text:span text:style-name="T11">Funciones principales:</text:span> <text:span text:style-name="T12">Recibir solicitud por WhatsApp, identificar activo, crear ticket de revisión, verificar documentación, enviar confirmación por email, enviar alertas automáticas.</text:span></text:p>
      <text:list text:style-name="L18">
        <text:list-item>
          <text:p text:style-name="P37">CU-67: Recibir mensaje de WhatsApp del responsable de área</text:p>
        </text:list-item>
        <text:list-item>
          <text:p text:style-name="P37">CU-68: Identificar activo por código en el mensaje (N8N + MS1)</text:p>
        </text:list-item>
        <text:list-item>
          <text:p text:style-name="P37">CU-69: Crear ticket de revisión en MS1 (REST desde N8N)</text:p>
        </text:list-item>
        <text:list-item>
          <text:p text:style-name="P37">CU-70: Verificar documentación del activo en MS2 (REST desde N8N)</text:p>
        </text:list-item>
        <text:list-item>
          <text:p text:style-name="P37">CU-71: Enviar email de confirmación de solicitud (SendGrid)</text:p>
        </text:list-item>
        <text:list-item>
          <text:p text:style-name="P37">CU-72: Responder por WhatsApp con estado de la solicitud</text:p>
        </text:list-item>
        <text:list-item>
          <text:p text:style-name="P37">CU-73: Enviar alerta automática por vencimiento de garantía</text:p>
        </text:list-item>
        <text:list-item>
          <text:p text:style-name="P37">CU-74: Enviar alerta de mantenimiento programado</text:p>
        </text:list-item>
      </text:list>
      <text:h text:style-name="P17" text:outline-level="2" text:is-list-header="true"><text:bookmark-start text:name="__RefHeading___Toc1067_1290176508"/>MÓDULO 11 — Registro Blockchain y Auditoría<text:bookmark-end text:name="__RefHeading___Toc1067_1290176508"/></text:h>
      <text:p text:style-name="P14"><text:span text:style-name="T11">Objetivo:</text:span> Garantizar la trazabilidad completa e inalterabilidad de cada transacción crítica del ciclo de vida de los activos mediante el registro en una red Blockchain. Cada cambio de estado del activo genera un hash inmutable verificable externamente.</text:p>
      <text:p text:style-name="P14"><text:span text:style-name="T11">Funciones principales:</text:span> <text:span text:style-name="T12">Registrar transacción en Blockchain, consultar hash de transacción, verificar integridad de registro, consultar historial Blockchain de un activo.</text:span></text:p>
      <text:list text:style-name="L19">
        <text:list-item>
          <text:p text:style-name="P38">CU-75: Registrar adquisición de activo en Blockchain</text:p>
        </text:list-item>
        <text:list-item>
          <text:p text:style-name="P38"><text:soft-page-break/>CU-76: Registrar asignación de activo en Blockchain</text:p>
        </text:list-item>
        <text:list-item>
          <text:p text:style-name="P38">CU-77: Registrar traslado de activo en Blockchain</text:p>
        </text:list-item>
        <text:list-item>
          <text:p text:style-name="P38">CU-78: Registrar baja de activo en Blockchain</text:p>
        </text:list-item>
        <text:list-item>
          <text:p text:style-name="P38">CU-79: Registrar diagnóstico crítico de IA en Blockchain</text:p>
        </text:list-item>
        <text:list-item>
          <text:p text:style-name="P38">CU-80: Consultar historial Blockchain de un activo (hash + bloque + timestamp)</text:p>
        </text:list-item>
        <text:list-item>
          <text:p text:style-name="P38">CU-81: Verificar integridad de registro Blockchain externamente</text:p>
        </text:list-item>
      </text:list>
      <text:h text:style-name="P15" text:outline-level="1"><text:bookmark-start text:name="__RefHeading___Toc1069_1290176508"/>6. Relación de Casos de Uso con Tecnologías Avanzadas<text:bookmark-end text:name="__RefHeading___Toc1069_1290176508"/></text:h>
      <text:h text:style-name="P17" text:outline-level="2"><text:bookmark-start text:name="__RefHeading___Toc1071_1290176508"/>6.1 Deep Learning<text:bookmark-end text:name="__RefHeading___Toc1071_1290176508"/></text:h>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18">Aplicación</text:p>
            </table:table-cell>
            <table:table-cell table:style-name="Tabla3.A1" office:value-type="string">
              <text:p text:style-name="P18">Casos de Uso</text:p>
            </table:table-cell>
            <table:table-cell table:style-name="Tabla3.A1" office:value-type="string">
              <text:p text:style-name="P18">Microservicio</text:p>
            </table:table-cell>
            <table:table-cell table:style-name="Tabla3.D1" office:value-type="string">
              <text:p text:style-name="P18">Herramienta</text:p>
            </table:table-cell>
          </table:table-row>
        </table:table-header-rows>
        <table:table-row>
          <table:table-cell table:style-name="Tabla3.A2" office:value-type="string">
            <text:p text:style-name="P20">Diagnóstico del estado físico de activos por imagen</text:p>
          </table:table-cell>
          <table:table-cell table:style-name="Tabla3.A2" office:value-type="string">
            <text:p text:style-name="P20">CU-35, CU-36, CU-37</text:p>
          </table:table-cell>
          <table:table-cell table:style-name="Tabla3.A2" office:value-type="string">
            <text:p text:style-name="P20">MS2 (FastAPI) + App Móvil</text:p>
          </table:table-cell>
          <table:table-cell table:style-name="Tabla3.D2" office:value-type="string">
            <text:p text:style-name="P20">CNN (TensorFlow / Keras)</text:p>
          </table:table-cell>
        </table:table-row>
        <table:table-row>
          <table:table-cell table:style-name="Tabla3.A2" office:value-type="string">
            <text:p text:style-name="P20">Clasificación de estado: Bueno / Deteriorado / Requiere mantenimiento</text:p>
          </table:table-cell>
          <table:table-cell table:style-name="Tabla3.A2" office:value-type="string">
            <text:p text:style-name="P20">CU-36</text:p>
          </table:table-cell>
          <table:table-cell table:style-name="Tabla3.A2" office:value-type="string">
            <text:p text:style-name="P20">MS2 (FastAPI)</text:p>
          </table:table-cell>
          <table:table-cell table:style-name="Tabla3.D2" office:value-type="string">
            <text:p text:style-name="P20">CNN — modelo entrenado sobre imágenes de activos</text:p>
          </table:table-cell>
        </table:table-row>
        <table:table-row>
          <table:table-cell table:style-name="Tabla3.A2" office:value-type="string">
            <text:p text:style-name="P20">Registro de diagnóstico crítico en Blockchain</text:p>
          </table:table-cell>
          <table:table-cell table:style-name="Tabla3.A2" office:value-type="string">
            <text:p text:style-name="P20">CU-79</text:p>
          </table:table-cell>
          <table:table-cell table:style-name="Tabla3.A2" office:value-type="string">
            <text:p text:style-name="P20">MS1 (Spring Boot)</text:p>
          </table:table-cell>
          <table:table-cell table:style-name="Tabla3.D2" office:value-type="string">
            <text:p text:style-name="P20">Resultado CNN → hash Blockchain</text:p>
          </table:table-cell>
        </table:table-row>
      </table:table>
      <text:p text:style-name="P14"/>
      <text:h text:style-name="P17" text:outline-level="2"><text:bookmark-start text:name="__RefHeading___Toc1073_1290176508"/>6.2 Machine Learning<text:bookmark-end text:name="__RefHeading___Toc1073_1290176508"/></text:h>
      <table:table table:name="Tabla4" table:style-name="Tabla4">
        <table:table-column table:style-name="Tabla4.A"/>
        <table:table-column table:style-name="Tabla4.B" table:number-columns-repeated="3"/>
        <table:table-column table:style-name="Tabla4.E"/>
        <table:table-header-rows>
          <table:table-row>
            <table:table-cell table:style-name="Tabla4.A1" office:value-type="string">
              <text:p text:style-name="P18">Tipo</text:p>
            </table:table-cell>
            <table:table-cell table:style-name="Tabla4.A1" office:value-type="string">
              <text:p text:style-name="P18">Aplicación</text:p>
            </table:table-cell>
            <table:table-cell table:style-name="Tabla4.A1" office:value-type="string">
              <text:p text:style-name="P18">Variables de entrada</text:p>
            </table:table-cell>
            <table:table-cell table:style-name="Tabla4.A1" office:value-type="string">
              <text:p text:style-name="P18">Casos de Uso</text:p>
            </table:table-cell>
            <table:table-cell table:style-name="Tabla4.E1" office:value-type="string">
              <text:p text:style-name="P18">Microservicio</text:p>
            </table:table-cell>
          </table:table-row>
        </table:table-header-rows>
        <table:table-row>
          <table:table-cell table:style-name="Tabla4.A2" office:value-type="string">
            <text:p text:style-name="P20">Supervisado — Regresión</text:p>
          </table:table-cell>
          <table:table-cell table:style-name="Tabla4.A2" office:value-type="string">
            <text:p text:style-name="P20">Predicción de vida útil restante del activo</text:p>
          </table:table-cell>
          <table:table-cell table:style-name="Tabla4.A2" office:value-type="string">
            <text:p text:style-name="P20">Edad, N° mantenimientos, categoría, diagnósticos históricos</text:p>
          </table:table-cell>
          <table:table-cell table:style-name="Tabla4.A2" office:value-type="string">
            <text:p text:style-name="P20">CU-61, CU-64, CU-65</text:p>
          </table:table-cell>
          <table:table-cell table:style-name="Tabla4.E2" office:value-type="string">
            <text:p text:style-name="P20">MS2 (FastAPI)</text:p>
          </table:table-cell>
        </table:table-row>
        <table:table-row>
          <table:table-cell table:style-name="Tabla4.A2" office:value-type="string">
            <text:p text:style-name="P20">Supervisado — Clasificación</text:p>
          </table:table-cell>
          <table:table-cell table:style-name="Tabla4.A2" office:value-type="string">
            <text:p text:style-name="P20">Probabilidad de fallo próximo</text:p>
          </table:table-cell>
          <table:table-cell table:style-name="Tabla4.A2" office:value-type="string">
            <text:p text:style-name="P20">Edad, estado, uso, mantenimientos</text:p>
          </table:table-cell>
          <table:table-cell table:style-name="Tabla4.A2" office:value-type="string">
            <text:p text:style-name="P20">CU-62, CU-64</text:p>
          </table:table-cell>
          <table:table-cell table:style-name="Tabla4.E2" office:value-type="string">
            <text:p text:style-name="P20">MS2 (FastAPI)</text:p>
          </table:table-cell>
        </table:table-row>
        <table:table-row>
          <table:table-cell table:style-name="Tabla4.A2" office:value-type="string">
            <text:p text:style-name="P20">No Supervisado — Clustering</text:p>
          </table:table-cell>
          <table:table-cell table:style-name="Tabla4.A2" office:value-type="string">
            <text:p text:style-name="P20">Agrupación de activos por patrones de comportamiento</text:p>
          </table:table-cell>
          <table:table-cell table:style-name="Tabla4.A2" office:value-type="string">
            <text:p text:style-name="P20">Frecuencia de mantenimiento, vida útil, estado, categoría</text:p>
          </table:table-cell>
          <table:table-cell table:style-name="Tabla4.A2" office:value-type="string">
            <text:p text:style-name="P20">CU-63, CU-66</text:p>
          </table:table-cell>
          <table:table-cell table:style-name="Tabla4.E2" office:value-type="string">
            <text:p text:style-name="P20">MS2 (FastAPI)</text:p>
          </table:table-cell>
        </table:table-row>
      </table:table>
      <text:p text:style-name="P14"/>
      <text:h text:style-name="P17" text:outline-level="2"><text:bookmark-start text:name="__RefHeading___Toc1075_1290176508"/><text:soft-page-break/>6.3 Blockchain<text:bookmark-end text:name="__RefHeading___Toc1075_1290176508"/></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18">Aplicación</text:p>
            </table:table-cell>
            <table:table-cell table:style-name="Tabla5.A1" office:value-type="string">
              <text:p text:style-name="P18">Casos de Uso</text:p>
            </table:table-cell>
            <table:table-cell table:style-name="Tabla5.A1" office:value-type="string">
              <text:p text:style-name="P18">Microservicio</text:p>
            </table:table-cell>
            <table:table-cell table:style-name="Tabla5.D1" office:value-type="string">
              <text:p text:style-name="P18">Herramienta</text:p>
            </table:table-cell>
          </table:table-row>
        </table:table-header-rows>
        <table:table-row>
          <table:table-cell table:style-name="Tabla5.A2" office:value-type="string">
            <text:p text:style-name="P20">Registro de adquisición de activo</text:p>
          </table:table-cell>
          <table:table-cell table:style-name="Tabla5.A2" office:value-type="string">
            <text:p text:style-name="P20">CU-75</text:p>
          </table:table-cell>
          <table:table-cell table:style-name="Tabla5.A2" office:value-type="string">
            <text:p text:style-name="P20">MS1 (Spring Boot)</text:p>
          </table:table-cell>
          <table:table-cell table:style-name="Tabla5.D2" office:value-type="string">
            <text:p text:style-name="P20">Ethereum Sepolia / Web3j / Hyperledger</text:p>
          </table:table-cell>
        </table:table-row>
        <table:table-row>
          <table:table-cell table:style-name="Tabla5.A2" office:value-type="string">
            <text:p text:style-name="P20">Registro de asignación de activo</text:p>
          </table:table-cell>
          <table:table-cell table:style-name="Tabla5.A2" office:value-type="string">
            <text:p text:style-name="P20">CU-76</text:p>
          </table:table-cell>
          <table:table-cell table:style-name="Tabla5.A2" office:value-type="string">
            <text:p text:style-name="P20">MS1 (Spring Boot)</text:p>
          </table:table-cell>
          <table:table-cell table:style-name="Tabla5.D2" office:value-type="string">
            <text:p text:style-name="P20">Ethereum Sepolia / Web3j</text:p>
          </table:table-cell>
        </table:table-row>
        <table:table-row>
          <table:table-cell table:style-name="Tabla5.A2" office:value-type="string">
            <text:p text:style-name="P20">Registro de traslado de activo</text:p>
          </table:table-cell>
          <table:table-cell table:style-name="Tabla5.A2" office:value-type="string">
            <text:p text:style-name="P20">CU-77</text:p>
          </table:table-cell>
          <table:table-cell table:style-name="Tabla5.A2" office:value-type="string">
            <text:p text:style-name="P20">MS1 (Spring Boot)</text:p>
          </table:table-cell>
          <table:table-cell table:style-name="Tabla5.D2" office:value-type="string">
            <text:p text:style-name="P20">Ethereum Sepolia / Web3j</text:p>
          </table:table-cell>
        </table:table-row>
        <table:table-row>
          <table:table-cell table:style-name="Tabla5.A2" office:value-type="string">
            <text:p text:style-name="P20">Registro de baja de activo</text:p>
          </table:table-cell>
          <table:table-cell table:style-name="Tabla5.A2" office:value-type="string">
            <text:p text:style-name="P20">CU-78</text:p>
          </table:table-cell>
          <table:table-cell table:style-name="Tabla5.A2" office:value-type="string">
            <text:p text:style-name="P20">MS1 (Spring Boot)</text:p>
          </table:table-cell>
          <table:table-cell table:style-name="Tabla5.D2" office:value-type="string">
            <text:p text:style-name="P20">Ethereum Sepolia / Web3j</text:p>
          </table:table-cell>
        </table:table-row>
        <table:table-row>
          <table:table-cell table:style-name="Tabla5.A2" office:value-type="string">
            <text:p text:style-name="P20">Registro de diagnóstico crítico por IA</text:p>
          </table:table-cell>
          <table:table-cell table:style-name="Tabla5.A2" office:value-type="string">
            <text:p text:style-name="P20">CU-79</text:p>
          </table:table-cell>
          <table:table-cell table:style-name="Tabla5.A2" office:value-type="string">
            <text:p text:style-name="P20">MS1 (Spring Boot)</text:p>
          </table:table-cell>
          <table:table-cell table:style-name="Tabla5.D2" office:value-type="string">
            <text:p text:style-name="P20">Ethereum Sepolia / Web3j</text:p>
          </table:table-cell>
        </table:table-row>
      </table:table>
      <text:p text:style-name="P14"/>
      <text:h text:style-name="P17" text:outline-level="2"><text:bookmark-start text:name="__RefHeading___Toc1077_1290176508"/>6.4 Automatización de Procesos — Flujo N8N<text:bookmark-end text:name="__RefHeading___Toc1077_1290176508"/></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18">Acción</text:p>
            </table:table-cell>
            <table:table-cell table:style-name="Tabla6.A1" office:value-type="string">
              <text:p text:style-name="P18">Caso de Uso</text:p>
            </table:table-cell>
            <table:table-cell table:style-name="Tabla6.C1" office:value-type="string">
              <text:p text:style-name="P18">Herramienta</text:p>
            </table:table-cell>
          </table:table-row>
        </table:table-header-rows>
        <table:table-row>
          <table:table-cell table:style-name="Tabla6.A2" office:value-type="string">
            <text:p text:style-name="P20">El responsable contacta al sistema por WhatsApp</text:p>
          </table:table-cell>
          <table:table-cell table:style-name="Tabla6.A2" office:value-type="string">
            <text:p text:style-name="P20">CU-67</text:p>
          </table:table-cell>
          <table:table-cell table:style-name="Tabla6.C2" office:value-type="string">
            <text:p text:style-name="P20">WhatsApp Business API + N8N</text:p>
          </table:table-cell>
        </table:table-row>
        <table:table-row>
          <table:table-cell table:style-name="Tabla6.A2" office:value-type="string">
            <text:p text:style-name="P20">N8N identifica el activo por código en el mensaje</text:p>
          </table:table-cell>
          <table:table-cell table:style-name="Tabla6.A2" office:value-type="string">
            <text:p text:style-name="P20">CU-68</text:p>
          </table:table-cell>
          <table:table-cell table:style-name="Tabla6.C2" office:value-type="string">
            <text:p text:style-name="P20">N8N (regex / NLP básico) + MS1 GraphQL</text:p>
          </table:table-cell>
        </table:table-row>
        <table:table-row>
          <table:table-cell table:style-name="Tabla6.A2" office:value-type="string">
            <text:p text:style-name="P20">N8N crea ticket de revisión en MS1</text:p>
          </table:table-cell>
          <table:table-cell table:style-name="Tabla6.A2" office:value-type="string">
            <text:p text:style-name="P20">CU-69</text:p>
          </table:table-cell>
          <table:table-cell table:style-name="Tabla6.C2" office:value-type="string">
            <text:p text:style-name="P20">N8N + MS1 REST / GraphQL</text:p>
          </table:table-cell>
        </table:table-row>
        <table:table-row>
          <table:table-cell table:style-name="Tabla6.A2" office:value-type="string">
            <text:p text:style-name="P20">N8N verifica documentación del activo en MS2</text:p>
          </table:table-cell>
          <table:table-cell table:style-name="Tabla6.A2" office:value-type="string">
            <text:p text:style-name="P20">CU-70</text:p>
          </table:table-cell>
          <table:table-cell table:style-name="Tabla6.C2" office:value-type="string">
            <text:p text:style-name="P20">N8N + MS2 REST</text:p>
          </table:table-cell>
        </table:table-row>
        <table:table-row>
          <table:table-cell table:style-name="Tabla6.A2" office:value-type="string">
            <text:p text:style-name="P20">El sistema envía confirmación por email (SendGrid)</text:p>
          </table:table-cell>
          <table:table-cell table:style-name="Tabla6.A2" office:value-type="string">
            <text:p text:style-name="P20">CU-71</text:p>
          </table:table-cell>
          <table:table-cell table:style-name="Tabla6.C2" office:value-type="string">
            <text:p text:style-name="P20">N8N + SendGrid API</text:p>
          </table:table-cell>
        </table:table-row>
        <table:table-row>
          <table:table-cell table:style-name="Tabla6.A2" office:value-type="string">
            <text:p text:style-name="P20">El sistema responde al WhatsApp con estado</text:p>
          </table:table-cell>
          <table:table-cell table:style-name="Tabla6.A2" office:value-type="string">
            <text:p text:style-name="P20">CU-72</text:p>
          </table:table-cell>
          <table:table-cell table:style-name="Tabla6.C2" office:value-type="string">
            <text:p text:style-name="P20">N8N + WhatsApp Business API</text:p>
          </table:table-cell>
        </table:table-row>
        <table:table-row>
          <table:table-cell table:style-name="Tabla6.A2" office:value-type="string">
            <text:p text:style-name="P20">N8N detecta vencimiento de garantía y genera alerta</text:p>
          </table:table-cell>
          <table:table-cell table:style-name="Tabla6.A2" office:value-type="string">
            <text:p text:style-name="P20">CU-73</text:p>
          </table:table-cell>
          <table:table-cell table:style-name="Tabla6.C2" office:value-type="string">
            <text:p text:style-name="P20">N8N (scheduler) + SendGrid</text:p>
          </table:table-cell>
        </table:table-row>
      </table:table>
      <text:p text:style-name="P14"/>
      <text:h text:style-name="P17" text:outline-level="2"><text:bookmark-start text:name="__RefHeading___Toc1079_1290176508"/>6.5 Inteligencia de Negocio<text:bookmark-end text:name="__RefHeading___Toc1079_1290176508"/></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18">Funcionalidad</text:p>
            </table:table-cell>
            <table:table-cell table:style-name="Tabla7.A1" office:value-type="string">
              <text:p text:style-name="P18">Casos de Uso</text:p>
            </table:table-cell>
            <table:table-cell table:style-name="Tabla7.A1" office:value-type="string">
              <text:p text:style-name="P18">KPI</text:p>
            </table:table-cell>
            <table:table-cell table:style-name="Tabla7.D1" office:value-type="string">
              <text:p text:style-name="P18">Microservicio</text:p>
            </table:table-cell>
          </table:table-row>
        </table:table-header-rows>
        <table:table-row>
          <table:table-cell table:style-name="Tabla7.A2" office:value-type="string">
            <text:p text:style-name="P20">Dashboard ejecutivo con KPIs</text:p>
          </table:table-cell>
          <table:table-cell table:style-name="Tabla7.A2" office:value-type="string">
            <text:p text:style-name="P20">CU-54</text:p>
          </table:table-cell>
          <table:table-cell table:style-name="Tabla7.A2" office:value-type="string">
            <text:p text:style-name="P20">KPI 1, 2, 3, 4, 5</text:p>
          </table:table-cell>
          <table:table-cell table:style-name="Tabla7.D2" office:value-type="string">
            <text:p text:style-name="P20">MS1 (Spring Boot) → Angular</text:p>
          </table:table-cell>
        </table:table-row>
        <table:table-row>
          <table:table-cell table:style-name="Tabla7.A2" office:value-type="string">
            <text:p text:style-name="P20">Total de activos y valor en libros</text:p>
          </table:table-cell>
          <table:table-cell table:style-name="Tabla7.A2" office:value-type="string">
            <text:p text:style-name="P20">CU-55</text:p>
          </table:table-cell>
          <table:table-cell table:style-name="Tabla7.A2" office:value-type="string">
            <text:p text:style-name="P20">KPI 1</text:p>
          </table:table-cell>
          <table:table-cell table:style-name="Tabla7.D2" office:value-type="string">
            <text:p text:style-name="P20">MS1 GraphQL: dashboardBI</text:p>
          </table:table-cell>
        </table:table-row>
        <table:table-row>
          <table:table-cell table:style-name="Tabla7.A2" office:value-type="string">
            <text:p text:style-name="P20">Depreciación acumulada por categoría y área</text:p>
          </table:table-cell>
          <table:table-cell table:style-name="Tabla7.A2" office:value-type="string">
            <text:p text:style-name="P20">CU-56</text:p>
          </table:table-cell>
          <table:table-cell table:style-name="Tabla7.A2" office:value-type="string">
            <text:p text:style-name="P20">KPI 2</text:p>
          </table:table-cell>
          <table:table-cell table:style-name="Tabla7.D2" office:value-type="string">
            <text:p text:style-name="P20">MS1 GraphQL: dashboardBI</text:p>
          </table:table-cell>
        </table:table-row>
        <table:table-row>
          <table:table-cell table:style-name="Tabla7.A2" office:value-type="string">
            <text:p text:style-name="P20">Distribución por estado (activo / mantenimiento / baja)</text:p>
          </table:table-cell>
          <table:table-cell table:style-name="Tabla7.A2" office:value-type="string">
            <text:p text:style-name="P20">CU-57</text:p>
          </table:table-cell>
          <table:table-cell table:style-name="Tabla7.A2" office:value-type="string">
            <text:p text:style-name="P20">KPI 3</text:p>
          </table:table-cell>
          <table:table-cell table:style-name="Tabla7.D2" office:value-type="string">
            <text:p text:style-name="P20">MS1 GraphQL: dashboardBI</text:p>
          </table:table-cell>
        </table:table-row>
        <table:table-row>
          <table:table-cell table:style-name="Tabla7.A2" office:value-type="string">
            <text:p text:style-name="P20">Tendencia de adquisiciones por año</text:p>
          </table:table-cell>
          <table:table-cell table:style-name="Tabla7.A2" office:value-type="string">
            <text:p text:style-name="P20">CU-58</text:p>
          </table:table-cell>
          <table:table-cell table:style-name="Tabla7.A2" office:value-type="string">
            <text:p text:style-name="P20">KPI 4</text:p>
          </table:table-cell>
          <table:table-cell table:style-name="Tabla7.D2" office:value-type="string">
            <text:p text:style-name="P20">MS1 GraphQL: dashboardBI</text:p>
          </table:table-cell>
        </table:table-row>
        <table:table-row>
          <table:table-cell table:style-name="Tabla7.A2" office:value-type="string">
            <text:p text:style-name="P20">Proyección de vida útil de activos críticos</text:p>
          </table:table-cell>
          <table:table-cell table:style-name="Tabla7.A2" office:value-type="string">
            <text:p text:style-name="P20">CU-59</text:p>
          </table:table-cell>
          <table:table-cell table:style-name="Tabla7.A2" office:value-type="string">
            <text:p text:style-name="P20">KPI 5</text:p>
          </table:table-cell>
          <table:table-cell table:style-name="Tabla7.D2" office:value-type="string">
            <text:p text:style-name="P20">MS1 GraphQL + MS2 ML</text:p>
          </table:table-cell>
        </table:table-row>
      </table:table>
      <text:p text:style-name="P14"><text:soft-page-break/></text:p>
      <text:p text:style-name="P39">KPIs implementados:</text:p>
      <text:list text:style-name="L20">
        <text:list-item>
          <text:p text:style-name="P40"><text:span text:style-name="T11">KPI 1:</text:span> Total de activos activos vs. dados de baja</text:p>
        </text:list-item>
        <text:list-item>
          <text:p text:style-name="P40"><text:span text:style-name="T11">KPI 2:</text:span> Valor total en libros por categoría y área</text:p>
        </text:list-item>
        <text:list-item>
          <text:p text:style-name="P40"><text:span text:style-name="T11">KPI 3:</text:span> Depreciación acumulada en el período</text:p>
        </text:list-item>
        <text:list-item>
          <text:p text:style-name="P40"><text:span text:style-name="T11">KPI 4:</text:span> Tasa de activos en mantenimiento vs. activos totales</text:p>
        </text:list-item>
        <text:list-item>
          <text:p text:style-name="P40"><text:span text:style-name="T11">KPI 5:</text:span> Proyección de activos próximos a vencer su vida útil (6 meses)</text:p>
        </text:list-item>
      </text:list>
      <text:h text:style-name="P17" text:outline-level="2" text:is-list-header="true"><text:bookmark-start text:name="__RefHeading___Toc1081_1290176508"/>6.6 Aplicación Móvil — Recursos Nativos del Dispositivo<text:bookmark-end text:name="__RefHeading___Toc1081_1290176508"/></text:h>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P18">ID</text:p>
            </table:table-cell>
            <table:table-cell table:style-name="Tabla8.A1" office:value-type="string">
              <text:p text:style-name="P18">Caso de Uso</text:p>
            </table:table-cell>
            <table:table-cell table:style-name="Tabla8.A1" office:value-type="string">
              <text:p text:style-name="P18">Recurso Nativo</text:p>
            </table:table-cell>
            <table:table-cell table:style-name="Tabla8.D1" office:value-type="string">
              <text:p text:style-name="P18">Tecnología IA</text:p>
            </table:table-cell>
          </table:table-row>
        </table:table-header-rows>
        <table:table-row>
          <table:table-cell table:style-name="Tabla8.A2" office:value-type="string">
            <text:p text:style-name="P20">CU-40</text:p>
          </table:table-cell>
          <table:table-cell table:style-name="Tabla8.A2" office:value-type="string">
            <text:p text:style-name="P20">Consultar activos asignados offline</text:p>
          </table:table-cell>
          <table:table-cell table:style-name="Tabla8.A2" office:value-type="string">
            <text:p text:style-name="P20">Almacenamiento local (AsyncStorage)</text:p>
          </table:table-cell>
          <table:table-cell table:style-name="Tabla8.D2" office:value-type="string">
            <text:p text:style-name="P20">—</text:p>
          </table:table-cell>
        </table:table-row>
        <table:table-row>
          <table:table-cell table:style-name="Tabla8.A2" office:value-type="string">
            <text:p text:style-name="P20">CU-34</text:p>
          </table:table-cell>
          <table:table-cell table:style-name="Tabla8.A2" office:value-type="string">
            <text:p text:style-name="P20">Fotografiar activo para diagnóstico</text:p>
          </table:table-cell>
          <table:table-cell table:style-name="Tabla8.A2" office:value-type="string">
            <text:p text:style-name="P20">Cámara trasera/frontal</text:p>
          </table:table-cell>
          <table:table-cell table:style-name="Tabla8.D2" office:value-type="string">
            <text:p text:style-name="P20">Deep Learning (CNN)</text:p>
          </table:table-cell>
        </table:table-row>
        <table:table-row>
          <table:table-cell table:style-name="Tabla8.A2" office:value-type="string">
            <text:p text:style-name="P20">CU-35</text:p>
          </table:table-cell>
          <table:table-cell table:style-name="Tabla8.A2" office:value-type="string">
            <text:p text:style-name="P20">Enviar imagen y recibir diagnóstico en tiempo real</text:p>
          </table:table-cell>
          <table:table-cell table:style-name="Tabla8.A2" office:value-type="string">
            <text:p text:style-name="P20">Cámara + red</text:p>
          </table:table-cell>
          <table:table-cell table:style-name="Tabla8.D2" office:value-type="string">
            <text:p text:style-name="P20">TensorFlow / CNN en MS2</text:p>
          </table:table-cell>
        </table:table-row>
        <table:table-row>
          <table:table-cell table:style-name="Tabla8.A2" office:value-type="string">
            <text:p text:style-name="P20">CU-42</text:p>
          </table:table-cell>
          <table:table-cell table:style-name="Tabla8.A2" office:value-type="string">
            <text:p text:style-name="P20">Registrar coordenadas GPS del activo</text:p>
          </table:table-cell>
          <table:table-cell table:style-name="Tabla8.A2" office:value-type="string">
            <text:p text:style-name="P20">GPS del dispositivo</text:p>
          </table:table-cell>
          <table:table-cell table:style-name="Tabla8.D2" office:value-type="string">
            <text:p text:style-name="P20">—</text:p>
          </table:table-cell>
        </table:table-row>
        <table:table-row>
          <table:table-cell table:style-name="Tabla8.A2" office:value-type="string">
            <text:p text:style-name="P20">CU-43</text:p>
          </table:table-cell>
          <table:table-cell table:style-name="Tabla8.A2" office:value-type="string">
            <text:p text:style-name="P20">Reportar problema por WhatsApp</text:p>
          </table:table-cell>
          <table:table-cell table:style-name="Tabla8.A2" office:value-type="string">
            <text:p text:style-name="P20">Aplicación WhatsApp nativa</text:p>
          </table:table-cell>
          <table:table-cell table:style-name="Tabla8.D2" office:value-type="string">
            <text:p text:style-name="P20">—</text:p>
          </table:table-cell>
        </table:table-row>
        <table:table-row>
          <table:table-cell table:style-name="Tabla8.A2" office:value-type="string">
            <text:p text:style-name="P20">CU-44</text:p>
          </table:table-cell>
          <table:table-cell table:style-name="Tabla8.A2" office:value-type="string">
            <text:p text:style-name="P20">Recibir notificaciones push de alertas</text:p>
          </table:table-cell>
          <table:table-cell table:style-name="Tabla8.A2" office:value-type="string">
            <text:p text:style-name="P20">Notificaciones push (FCM)</text:p>
          </table:table-cell>
          <table:table-cell table:style-name="Tabla8.D2" office:value-type="string">
            <text:p text:style-name="P20">—</text:p>
          </table:table-cell>
        </table:table-row>
        <table:table-row>
          <table:table-cell table:style-name="Tabla8.A2" office:value-type="string">
            <text:p text:style-name="P20">CU-45</text:p>
          </table:table-cell>
          <table:table-cell table:style-name="Tabla8.A2" office:value-type="string">
            <text:p text:style-name="P20">Sincronizar datos offline al recuperar conexión</text:p>
          </table:table-cell>
          <table:table-cell table:style-name="Tabla8.A2" office:value-type="string">
            <text:p text:style-name="P20">Almacenamiento local</text:p>
          </table:table-cell>
          <table:table-cell table:style-name="Tabla8.D2" office:value-type="string">
            <text:p text:style-name="P20">—</text:p>
          </table:table-cell>
        </table:table-row>
      </table:table>
      <text:p text:style-name="P14"/>
      <text:h text:style-name="P17" text:outline-level="2"><text:bookmark-start text:name="__RefHeading___Toc1083_1290176508"/>6.7 Gestión Documental — Módulos con Auditoría<text:bookmark-end text:name="__RefHeading___Toc1083_1290176508"/></text:h>
      <table:table table:name="Tabla9" table:style-name="Tabla9">
        <table:table-column table:style-name="Tabla9.A"/>
        <table:table-column table:style-name="Tabla9.B"/>
        <table:table-column table:style-name="Tabla9.C"/>
        <table:table-column table:style-name="Tabla9.D"/>
        <table:table-header-rows>
          <table:table-row>
            <table:table-cell table:style-name="Tabla9.A1" office:value-type="string">
              <text:p text:style-name="P18">Módulo</text:p>
            </table:table-cell>
            <table:table-cell table:style-name="Tabla9.A1" office:value-type="string">
              <text:p text:style-name="P18">Contexto</text:p>
            </table:table-cell>
            <table:table-cell table:style-name="Tabla9.A1" office:value-type="string">
              <text:p text:style-name="P18">Casos de Uso</text:p>
            </table:table-cell>
            <table:table-cell table:style-name="Tabla9.D1" office:value-type="string">
              <text:p text:style-name="P18">Microservicio</text:p>
            </table:table-cell>
          </table:table-row>
        </table:table-header-rows>
        <table:table-row>
          <table:table-cell table:style-name="Tabla9.A2" office:value-type="string">
            <text:p text:style-name="P20">Módulo Documental de Activos</text:p>
          </table:table-cell>
          <table:table-cell table:style-name="Tabla9.A2" office:value-type="string">
            <text:p text:style-name="P20">Documentos técnicos y legales de activos: facturas, garantías, informes</text:p>
          </table:table-cell>
          <table:table-cell table:style-name="Tabla9.A2" office:value-type="string">
            <text:p text:style-name="P20">CU-26 al CU-33</text:p>
          </table:table-cell>
          <table:table-cell table:style-name="Tabla9.D2" office:value-type="string">
            <text:p text:style-name="P20">MS2 (FastAPI) + S3</text:p>
          </table:table-cell>
        </table:table-row>
        <table:table-row>
          <table:table-cell table:style-name="Tabla9.A2" office:value-type="string">
            <text:p text:style-name="P20">Módulo Documental de Bajas</text:p>
          </table:table-cell>
          <table:table-cell table:style-name="Tabla9.A2" office:value-type="string">
            <text:p text:style-name="P20">Actas de baja, autorizaciones, documentación de retiro</text:p>
          </table:table-cell>
          <table:table-cell table:style-name="Tabla9.A2" office:value-type="string">
            <text:p text:style-name="P20">CU-25, CU-30, CU-31</text:p>
          </table:table-cell>
          <table:table-cell table:style-name="Tabla9.D2" office:value-type="string">
            <text:p text:style-name="P20">MS2 (FastAPI) + S3</text:p>
          </table:table-cell>
        </table:table-row>
        <table:table-row>
          <table:table-cell table:style-name="Tabla9.A2" office:value-type="string">
            <text:p text:style-name="P20">Auditoría de acceso</text:p>
          </table:table-cell>
          <table:table-cell table:style-name="Tabla9.A2" office:value-type="string">
            <text:p text:style-name="P20">Registro de quién accedió, cuándo y qué acción realizó</text:p>
          </table:table-cell>
          <table:table-cell table:style-name="Tabla9.A2" office:value-type="string">
            <text:p text:style-name="P20">CU-31</text:p>
          </table:table-cell>
          <table:table-cell table:style-name="Tabla9.D2" office:value-type="string">
            <text:p text:style-name="P20">Ambos módulos — DynamoDB</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rial" svg:font-family="Arial, sans-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SV"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SV"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Text_20_body" style:next-style-name="Text_20_body"/>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3.2$Linux_X86_64 LibreOffice_project/620$Build-2</meta:generator>
    <dc:date>2026-06-02T17:23:48.260585497</dc:date>
    <meta:editing-duration>PT15M52S</meta:editing-duration>
    <meta:editing-cycles>5</meta:editing-cycles>
    <meta:print-date>2026-06-02T05:09:18.017515149</meta:print-date>
    <meta:printed-by>Archivos PDF</meta:printed-by>
    <meta:document-statistic meta:table-count="9" meta:image-count="2" meta:object-count="0" meta:page-count="14" meta:paragraph-count="440" meta:word-count="3208" meta:character-count="21182" meta:non-whitespace-character-count="18467"/>
  </office:meta>
</office:document-meta>
</file>